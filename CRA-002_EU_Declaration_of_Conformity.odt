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168cm" table:align="left"/>
    </style:style>
    <style:style style:name="Table1.A" style:family="table-column">
      <style:table-column-properties style:column-width="1.572cm"/>
    </style:style>
    <style:style style:name="Table1.B" style:family="table-column">
      <style:table-column-properties style:column-width="1.252cm"/>
    </style:style>
    <style:style style:name="Table1.C" style:family="table-column">
      <style:table-column-properties style:column-width="2.34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Heading_20_1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A-002</text:h>
      <text:h text:style-name="Heading_20_1" text:outline-level="1">EU Declaration of Conformity</text:h>
      <text:p text:style-name="Text_20_body"><text:span text:style-name="Strong_20_Emphasis">Document ID:</text:span> CRA-002</text:p>
      <text:p text:style-name="Text_20_body"><text:span text:style-name="Strong_20_Emphasis">Document Title:</text:span> EU Declaration of Conformity</text:p>
      <text:p text:style-name="Text_20_body"><text:span text:style-name="Strong_20_Emphasis">Version:</text:span> 0.1 Draft</text:p>
      <text:p text:style-name="Text_20_body"><text:span text:style-name="Strong_20_Emphasis">Date:</text:span> [Date]</text:p>
      <text:p text:style-name="Text_20_body"/>
      <text:h text:style-name="Heading_20_1" text:outline-level="1">1. Manufacturer</text:h>
      <text:p text:style-name="Text_20_body"><text:span text:style-name="Strong_20_Emphasis">Manufacturer</text:span></text:p>
      <text:p text:style-name="Text_20_body">[Company Name]</text:p>
      <text:p text:style-name="Text_20_body">[Street Address]</text:p>
      <text:p text:style-name="Text_20_body">[Postal Code, City]</text:p>
      <text:p text:style-name="Text_20_body">[Country]</text:p>
      <text:p text:style-name="Text_20_body">Telephone:</text:p>
      <text:p text:style-name="Text_20_body">E-mail: </text:p>
      <text:p text:style-name="Text_20_body">Website:</text:p>
      <text:h text:style-name="Heading_20_1" text:outline-level="1">2. Declaration</text:h>
      <text:p text:style-name="Text_20_body"/>
      <text:p text:style-name="Text_20_body">This Declaration of Conformity is issued under the sole responsibility of the manufacturer.</text:p>
      <text:p text:style-name="Text_20_body">The manufacturer declares that the product described in this document complies with the applicable requirements of the relevant European Union legislation.</text:p>
      <text:h text:style-name="Heading_20_1" text:outline-level="1">3. Product Identification</text:h>
      <text:p text:style-name="Text_20_body"><text:span text:style-name="Strong_20_Emphasis">Product Name</text:span></text:p>
      <text:p text:style-name="Text_20_body">Industrial Servo Controller</text:p>
      <text:p text:style-name="Text_20_body"><text:span text:style-name="Strong_20_Emphasis">Model</text:span></text:p>
      <text:p text:style-name="Text_20_body">SC-100</text:p>
      <text:p text:style-name="Text_20_body"><text:span text:style-name="Strong_20_Emphasis">Product Type</text:span></text:p>
      <text:p text:style-name="Text_20_body">Industrial Embedded Servo Controller</text:p>
      <text:p text:style-name="Text_20_body"><text:span text:style-name="Strong_20_Emphasis">Intended Use</text:span></text:p>
      <text:p text:style-name="Text_20_body">Real-time control of PMSM and BLDC motors within industrial automation and robotic systems.</text:p>
      <text:h text:style-name="Heading_20_1" text:outline-level="1"><text:soft-page-break/>4. Product Description</text:h>
      <text:p text:style-name="Text_20_body">The product is an embedded industrial controller intended for permanent installation inside industrial equipment.</text:p>
      <text:p text:style-name="Text_20_body">The controller communicates with external equipment only through local industrial communication interfaces.</text:p>
      <text:p text:style-name="Text_20_body">The assessed product does not provide Internet connectivity or wireless communication interfaces.</text:p>
      <text:p text:style-name="Text_20_body">Typical communication interfaces include:</text:p>
      <text:list xml:id="list1615490331563109583" text:style-name="L1">
        <text:list-item>
          <text:p text:style-name="P1">CAN-FD</text:p>
        </text:list-item>
        <text:list-item>
          <text:p text:style-name="P1">RS-232 (Service)</text:p>
        </text:list-item>
        <text:list-item>
          <text:p text:style-name="P1">SWD/JTAG (Manufacturing and Service)</text:p>
        </text:list-item>
      </text:list>
      <text:h text:style-name="Heading_20_1" text:outline-level="1">5. Applicable European Union Legislation</text:h>
      <text:p text:style-name="Text_20_body">The manufacturer declares that the product complies with the applicable provisions of:</text:p>
      <text:list xml:id="list4153743793695980667" text:style-name="L2">
        <text:list-item>
          <text:p text:style-name="P2">Regulation (EU) 2024/2847 (Cyber Resilience Act), where applicable.</text:p>
        </text:list-item>
        <text:list-item>
          <text:p text:style-name="P2">Directive 2014/30/EU (Electromagnetic Compatibility Directive), where applicable.</text:p>
        </text:list-item>
        <text:list-item>
          <text:p text:style-name="P2">Directive 2014/35/EU (Low Voltage Directive), where applicable.</text:p>
        </text:list-item>
        <text:list-item>
          <text:p text:style-name="P2">Directive 2011/65/EU (RoHS), where applicable.</text:p>
        </text:list-item>
        <text:list-item>
          <text:p text:style-name="P2">Any other applicable Union harmonisation legislation relevant to the final product configuration.</text:p>
        </text:list-item>
      </text:list>
      <text:h text:style-name="Heading_20_1" text:outline-level="1">6. Applied Standards</text:h>
      <text:p text:style-name="Text_20_body">Where applicable, conformity has been assessed using relevant harmonised standards and/or recognised engineering practices.</text:p>
      <text:p text:style-name="Text_20_body">Examples may include:</text:p>
      <text:list xml:id="list3527231457759555400" text:style-name="L3">
        <text:list-item>
          <text:p text:style-name="P3">IEC 62443 (where applicable)</text:p>
        </text:list-item>
        <text:list-item>
          <text:p text:style-name="P3">IEC 61508 (where applicable)</text:p>
        </text:list-item>
        <text:list-item>
          <text:p text:style-name="P3">IEC 61800 series (where applicable)</text:p>
        </text:list-item>
        <text:list-item>
          <text:p text:style-name="P3">Other applicable standards used during product development.</text:p>
        </text:list-item>
      </text:list>
      <text:h text:style-name="Heading_20_1" text:outline-level="1"/>
      <text:h text:style-name="P7" text:outline-level="1">7. Cybersecurity Assessment</text:h>
      <text:p text:style-name="Text_20_body"/>
      <text:p text:style-name="Text_20_body">A cybersecurity assessment has been performed for the product and documented in:</text:p>
      <text:p text:style-name="Text_20_body"><text:span text:style-name="Strong_20_Emphasis"/></text:p>
      <text:p text:style-name="Text_20_body"><text:span text:style-name="Strong_20_Emphasis">CRA-001 – Cybersecurity Risk Assessment</text:span></text:p>
      <text:p text:style-name="Text_20_body">The assessment considered:</text:p>
      <text:list xml:id="list541720614065438830" text:style-name="L4">
        <text:list-item>
          <text:p text:style-name="P4">intended operating environment;</text:p>
        </text:list-item>
        <text:list-item>
          <text:p text:style-name="P4">product architecture;</text:p>
        </text:list-item>
        <text:list-item>
          <text:p text:style-name="P4">communication interfaces;</text:p>
        </text:list-item>
        <text:list-item>
          <text:p text:style-name="P4">realistic cyber attack surface;</text:p>
        </text:list-item>
        <text:list-item>
          <text:p text:style-name="P4">residual cybersecurity risk.</text:p>
        </text:list-item>
      </text:list>
      <text:p text:style-name="Text_20_body">The assessment concluded that the product presents a limited cyber attack surface consistent with its intended use as an industrial embedded controller.</text:p>
      <text:h text:style-name="Heading_20_1" text:outline-level="1">8. Technical Documentation</text:h>
      <text:p text:style-name="Text_20_body"/>
      <text:p text:style-name="Text_20_body">The manufacturer maintains technical documentation supporting this declaration.</text:p>
      <text:p text:style-name="Text_20_body">The technical documentation includes, where applicable:</text:p>
      <text:list xml:id="list1189087609972090447" text:style-name="L5">
        <text:list-item>
          <text:p text:style-name="P5">Product Description</text:p>
        </text:list-item>
        <text:list-item>
          <text:p text:style-name="P5">Hardware Documentation</text:p>
        </text:list-item>
        <text:list-item>
          <text:p text:style-name="P5">Firmware Description</text:p>
        </text:list-item>
        <text:list-item>
          <text:p text:style-name="P5">Cybersecurity Risk Assessment</text:p>
        </text:list-item>
        <text:list-item>
          <text:p text:style-name="P5">Test Reports</text:p>
        </text:list-item>
        <text:list-item>
          <text:p text:style-name="P5">User Documentation</text:p>
        </text:list-item>
        <text:list-item>
          <text:p text:style-name="P5">Manufacturing Records</text:p>
        </text:list-item>
        <text:list-item>
          <text:p text:style-name="P5">Applicable Compliance Documentation</text:p>
        </text:list-item>
      </text:list>
      <text:p text:style-name="Text_20_body">The technical documentation is retained in accordance with applicable legal requirements.</text:p>
      <text:p text:style-name="Text_20_body"/>
      <text:h text:style-name="P7" text:outline-level="1">9. Supported Product Configuration</text:h>
      <text:p text:style-name="Text_20_body"/>
      <text:p text:style-name="Text_20_body">This declaration applies only to products matching the following characteristics:</text:p>
      <text:list xml:id="list5140463819926250463" text:style-name="L6">
        <text:list-item>
          <text:p text:style-name="P6">Industrial embedded servo controller</text:p>
        </text:list-item>
        <text:list-item>
          <text:p text:style-name="P6">No Internet connectivity</text:p>
        </text:list-item>
        <text:list-item>
          <text:p text:style-name="P6">No wireless communication interfaces</text:p>
        </text:list-item>
        <text:list-item>
          <text:p text:style-name="P6">Local industrial communication interfaces only</text:p>
        </text:list-item>
        <text:list-item>
          <text:p text:style-name="P6">Intended installation inside industrial equipment</text:p>
        </text:list-item>
      </text:list>
      <text:p text:style-name="Text_20_body">Any product variant introducing additional communication technologies or significantly modifying the cybersecurity characteristics should be evaluated separately.</text:p>
      <text:h text:style-name="Heading_20_1" text:outline-level="1">10. Declaration</text:h>
      <text:p text:style-name="Text_20_body"/>
      <text:p text:style-name="Text_20_body">The undersigned hereby declares that the product identified in this document conforms to the applicable requirements of the relevant European Union legislation listed above.</text:p>
      <text:p text:style-name="Text_20_body">This declaration remains valid only for products manufactured, configured and operated in accordance with the associated technical documentation.</text:p>
      <text:p text:style-name="Text_20_body"/>
      <text:h text:style-name="Heading_20_1" text:outline-level="1">11. Authorised Representative (if applicable)</text:h>
      <text:p text:style-name="Text_20_body">Company:</text:p>
      <text:p text:style-name="Text_20_body">Address:</text:p>
      <text:p text:style-name="Text_20_body">Country:</text:p>
      <text:h text:style-name="Heading_20_1" text:outline-level="1">12. Signature</text:h>
      <text:p text:style-name="Text_20_body">Place:</text:p>
      <text:p text:style-name="Text_20_body">Date:</text:p>
      <text:p text:style-name="Text_20_body">Name:</text:p>
      <text:p text:style-name="Text_20_body">Position:</text:p>
      <text:p text:style-name="Text_20_body">Signature:</text:p>
      <text:h text:style-name="Heading_20_1" text:outline-level="1">Document Histo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0.1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Initial Draf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Radonic</meta:initial-creator>
    <meta:creation-date>2026-07-06T10:57:00.02</meta:creation-date>
    <dc:date>2026-07-06T11:03:29.86</dc:date>
    <dc:creator>Boris Radonic</dc:creator>
    <meta:editing-duration>PT6M29S</meta:editing-duration>
    <meta:editing-cycles>3</meta:editing-cycles>
    <meta:generator>OpenOffice/4.1.16$Win32 OpenOffice.org_project/4116m3$Build-9816</meta:generator>
    <meta:document-statistic meta:table-count="1" meta:image-count="0" meta:object-count="0" meta:page-count="4" meta:paragraph-count="99" meta:word-count="503" meta:character-count="3851"/>
  </office:meta>
</office:document-meta>
</file>
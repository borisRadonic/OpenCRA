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001cm" table:align="left"/>
    </style:style>
    <style:style style:name="Table2.A" style:family="table-column">
      <style:table-column-properties style:column-width="1.653cm"/>
    </style:style>
    <style:style style:name="Table2.B" style:family="table-column">
      <style:table-column-properties style:column-width="4.3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904cm" fo:margin-left="0.478cm" fo:margin-right="9.618cm" table:align="margins"/>
    </style:style>
    <style:style style:name="Table3.A" style:family="table-column">
      <style:table-column-properties style:column-width="2.646cm" style:rel-column-width="1500*"/>
    </style:style>
    <style:style style:name="Table3.B" style:family="table-column">
      <style:table-column-properties style:column-width="1.877cm" style:rel-column-width="1064*"/>
    </style:style>
    <style:style style:name="Table3.C" style:family="table-column">
      <style:table-column-properties style:column-width="2.381cm" style:rel-column-width="1350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168cm" table:align="left"/>
    </style:style>
    <style:style style:name="Table4.A" style:family="table-column">
      <style:table-column-properties style:column-width="1.572cm"/>
    </style:style>
    <style:style style:name="Table4.B" style:family="table-column">
      <style:table-column-properties style:column-width="1.252cm"/>
    </style:style>
    <style:style style:name="Table4.C" style:family="table-column">
      <style:table-column-properties style:column-width="2.344cm"/>
    </style:style>
    <style:style style:name="Table4.A1" style:family="table-cell">
      <style:table-cell-properties style:vertical-align="middle" fo:padding="0.049cm" fo:border="none"/>
    </style:style>
    <style:style style:name="Table1" style:family="table">
      <style:table-properties style:width="9.957cm" fo:margin-left="0.478cm" fo:margin-right="6.565cm" table:align="margins"/>
    </style:style>
    <style:style style:name="Table1.A" style:family="table-column">
      <style:table-column-properties style:column-width="3.944cm" style:rel-column-width="2236*"/>
    </style:style>
    <style:style style:name="Table1.B" style:family="table-column">
      <style:table-column-properties style:column-width="3.224cm" style:rel-column-width="1828*"/>
    </style:style>
    <style:style style:name="Table1.C" style:family="table-column">
      <style:table-column-properties style:column-width="2.789cm" style:rel-column-width="1581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Heading_20_1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A-004</text:h>
      <text:h text:style-name="Heading_20_1" text:outline-level="1">Website Security Information</text:h>
      <text:p text:style-name="Text_20_body"/>
      <text:p text:style-name="Text_20_body"><text:span text:style-name="Strong_20_Emphasis">Document ID:</text:span> CRA-004</text:p>
      <text:p text:style-name="Text_20_body"><text:span text:style-name="Strong_20_Emphasis">Document Title:</text:span> Website Security Information</text:p>
      <text:p text:style-name="Text_20_body"><text:span text:style-name="Strong_20_Emphasis">Version:</text:span> 1.0 Draft</text:p>
      <text:p text:style-name="Text_20_body"><text:span text:style-name="Strong_20_Emphasis">Date:</text:span> [Date]</text:p>
      <text:h text:style-name="Heading_20_1" text:outline-level="1">1. Purpose</text:h>
      <text:p text:style-name="Text_20_body">This document defines the cybersecurity information that shall be made publicly available through the manufacturer's website for products with digital elements.</text:p>
      <text:p text:style-name="Text_20_body">The objective is to provide customers, distributors and cybersecurity researchers with clear information regarding product support, vulnerability reporting and security-related product updates.</text:p>
      <text:h text:style-name="Heading_20_1" text:outline-level="1">2. Security Contact</text:h>
      <text:p text:style-name="Text_20_body">The manufacturer provides a dedicated contact point for cybersecurity-related enquiries.</text:p>
      <text:p text:style-name="Text_20_body"><text:span text:style-name="Strong_20_Emphasis">Company</text:span></text:p>
      <text:p text:style-name="Text_20_body">[Company Name]</text:p>
      <text:p text:style-name="Text_20_body"><text:span text:style-name="Strong_20_Emphasis">Email</text:span></text:p>
      <text:p text:style-name="Text_20_body">security@[company].com</text:p>
      <text:p text:style-name="Text_20_body"><text:span text:style-name="Strong_20_Emphasis">Website</text:span></text:p>
      <text:p text:style-name="Text_20_body"><text:a xlink:type="simple" xlink:href="https://www.example.com/security" text:style-name="Internet_20_link" text:visited-style-name="Visited_20_Internet_20_Link">https://www.example.com/security</text:a></text:p>
      <text:p text:style-name="Text_20_body">This contact point should be used exclusively for reporting suspected cybersecurity vulnerabilities or security-related issues.</text:p>
      <text:p text:style-name="Text_20_body"/>
      <text:h text:style-name="P7" text:outline-level="1">3. Supported Products</text:h>
      <text:p text:style-name="Text_20_body"/>
      <text:p text:style-name="Text_20_body">The manufacturer's website should identify the products currently receiving cybersecurity support.</text:p>
      <text:p text:style-name="Text_20_body">For each supported product, the following information should be available:</text:p>
      <text:list xml:id="list6981945796201325178" text:style-name="L1">
        <text:list-item>
          <text:p text:style-name="P1">Product name</text:p>
        </text:list-item>
        <text:list-item>
          <text:p text:style-name="P1">Product model</text:p>
        </text:list-item>
        <text:list-item>
          <text:p text:style-name="P1">Current firmware version</text:p>
        </text:list-item>
        <text:list-item>
          <text:p text:style-name="P1">Current documentation version</text:p>
        </text:list-item>
        <text:list-item>
          <text:p text:style-name="P1">Product support status</text:p>
          <text:p text:style-name="P1"/>
        </text:list-item>
      </text:list>
      <text:p text:style-name="Text_20_body">Example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duct</text:p>
            </table:table-cell>
            <table:table-cell table:style-name="Table1.A1" office:value-type="string">
              <text:p text:style-name="Table_20_Heading">Latest Firmware</text:p>
            </table:table-cell>
            <table:table-cell table:style-name="Table1.A1" office:value-type="string">
              <text:p text:style-name="Table_20_Heading">Support Status</text:p>
            </table:table-cell>
          </table:table-row>
        </table:table-header-rows>
        <table:table-row>
          <table:table-cell table:style-name="Table1.A1" office:value-type="string">
            <text:p text:style-name="Table_20_Contents">Servo Controller SC-100</text:p>
          </table:table-cell>
          <table:table-cell table:style-name="Table1.A1" office:value-type="string">
            <text:p text:style-name="Table_20_Contents">1.4.2</text:p>
          </table:table-cell>
          <table:table-cell table:style-name="Table1.A1" office:value-type="string">
            <text:p text:style-name="Table_20_Contents">Supported</text:p>
          </table:table-cell>
        </table:table-row>
        <table:table-row>
          <table:table-cell table:style-name="Table1.A1" office:value-type="string">
            <text:p text:style-name="Table_20_Contents">Servo Controller SC-200</text:p>
          </table:table-cell>
          <table:table-cell table:style-name="Table1.A1" office:value-type="string">
            <text:p text:style-name="Table_20_Contents">2.1.0</text:p>
          </table:table-cell>
          <table:table-cell table:style-name="Table1.A1" office:value-type="string">
            <text:p text:style-name="Table_20_Contents">Supported</text:p>
          </table:table-cell>
        </table:table-row>
      </table:table>
      <text:h text:style-name="Heading_20_1" text:outline-level="1">4. Security Updates</text:h>
      <text:p text:style-name="Text_20_body"/>
      <text:p text:style-name="Text_20_body">Where cybersecurity-related firmware updates become available, the website should provide:</text:p>
      <text:list xml:id="list1069921067764996183" text:style-name="L2">
        <text:list-item>
          <text:p text:style-name="P2">Firmware version</text:p>
        </text:list-item>
        <text:list-item>
          <text:p text:style-name="P2">Release date</text:p>
        </text:list-item>
        <text:list-item>
          <text:p text:style-name="P2">Short description of the issue addressed</text:p>
        </text:list-item>
        <text:list-item>
          <text:p text:style-name="P2">Installation instructions or reference to the User Manual</text:p>
        </text:list-item>
      </text:list>
      <text:p text:style-name="Text_20_body">The published information should enable customers to determine whether a security update is relevant to their product.</text:p>
      <text:h text:style-name="Heading_20_1" text:outline-level="1">5. Product Support Period</text:h>
      <text:p text:style-name="Text_20_body"/>
      <text:p text:style-name="Text_20_body">The website should indicate the period during which cybersecurity updates are expected to be provided.</text:p>
      <text:p text:style-name="Text_20_body">Example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roduct</text:p>
            </table:table-cell>
            <table:table-cell table:style-name="Table2.A1" office:value-type="string">
              <text:p text:style-name="Table_20_Heading">Security Support Until</text:p>
            </table:table-cell>
          </table:table-row>
        </table:table-header-rows>
        <table:table-row>
          <table:table-cell table:style-name="Table2.A1" office:value-type="string">
            <text:p text:style-name="Table_20_Contents">SC-100</text:p>
          </table:table-cell>
          <table:table-cell table:style-name="Table2.A1" office:value-type="string">
            <text:p text:style-name="Table_20_Contents">31 December 2034</text:p>
          </table:table-cell>
        </table:table-row>
      </table:table>
      <text:p text:style-name="Text_20_body"><text:soft-page-break/>If the support period changes, the published information should be updated accordingly.</text:p>
      <text:h text:style-name="Heading_20_1" text:outline-level="1">6. Vulnerability Reporting</text:h>
      <text:p text:style-name="Text_20_body"/>
      <text:p text:style-name="Text_20_body">The manufacturer's Vulnerability Disclosure Policy is available as a separate document.</text:p>
      <text:p text:style-name="Text_20_body">Reference:</text:p>
      <text:p text:style-name="Text_20_body"><text:span text:style-name="Strong_20_Emphasis">CRA-003 – Vulnerability Disclosure Policy</text:span></text:p>
      <text:p text:style-name="Text_20_body">The website should provide a direct link to this policy together with the security contact email address.</text:p>
      <text:h text:style-name="Heading_20_1" text:outline-level="1">7. Security Advisories</text:h>
      <text:p text:style-name="Text_20_body"/>
      <text:p text:style-name="Text_20_body">Where appropriate, the manufacturer may publish Security Advisories.</text:p>
      <text:p text:style-name="Text_20_body">Each advisory should include:</text:p>
      <text:list xml:id="list7158181279943995441" text:style-name="L3">
        <text:list-item>
          <text:p text:style-name="P3">Advisory identifier</text:p>
        </text:list-item>
        <text:list-item>
          <text:p text:style-name="P3">Publication date</text:p>
        </text:list-item>
        <text:list-item>
          <text:p text:style-name="P3">Affected product(s)</text:p>
        </text:list-item>
        <text:list-item>
          <text:p text:style-name="P3">Firmware version(s)</text:p>
        </text:list-item>
        <text:list-item>
          <text:p text:style-name="P3">Description of the issue</text:p>
        </text:list-item>
        <text:list-item>
          <text:p text:style-name="P3">Recommended actions</text:p>
        </text:list-item>
      </text:list>
      <text:p text:style-name="Text_20_body">Example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dvisory ID</text:p>
            </table:table-cell>
            <table:table-cell table:style-name="Table3.A1" office:value-type="string">
              <text:p text:style-name="Table_20_Heading">Product</text:p>
            </table:table-cell>
            <table:table-cell table:style-name="Table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.A1" office:value-type="string">
            <text:p text:style-name="Table_20_Contents">SA-2027-001</text:p>
          </table:table-cell>
          <table:table-cell table:style-name="Table3.A1" office:value-type="string">
            <text:p text:style-name="Table_20_Contents">SC-100</text:p>
          </table:table-cell>
          <table:table-cell table:style-name="Table3.A1" office:value-type="string">
            <text:p text:style-name="Table_20_Contents">Closed</text:p>
          </table:table-cell>
        </table:table-row>
      </table:table>
      <text:h text:style-name="Heading_20_1" text:outline-level="1">8. Product Documentation</text:h>
      <text:p text:style-name="Text_20_body"/>
      <text:p text:style-name="Text_20_body">The website should provide access to the latest publicly available documentation relevant to cybersecurity, where appropriate.</text:p>
      <text:p text:style-name="Text_20_body">Examples include:</text:p>
      <text:list xml:id="list7084853353559544920" text:style-name="L4">
        <text:list-item>
          <text:p text:style-name="P4">User Manual</text:p>
        </text:list-item>
        <text:list-item>
          <text:p text:style-name="P4">Installation Manual</text:p>
        </text:list-item>
        <text:list-item>
          <text:p text:style-name="P4">Release Notes</text:p>
        </text:list-item>
        <text:list-item>
          <text:p text:style-name="P4">Security Advisories</text:p>
        </text:list-item>
        <text:list-item>
          <text:p text:style-name="P4">Firmware Update Instructions</text:p>
        </text:list-item>
      </text:list>
      <text:p text:style-name="Text_20_body">Confidential engineering documentation and internal technical documentation are not intended for public distribution.</text:p>
      <text:p text:style-name="Text_20_body"><text:soft-page-break/></text:p>
      <text:h text:style-name="Heading_20_1" text:outline-level="1">9. Open Source Software Information</text:h>
      <text:p text:style-name="Text_20_body"/>
      <text:p text:style-name="Text_20_body">Where applicable, the website should provide information regarding open-source software used within the product.</text:p>
      <text:p text:style-name="Text_20_body">This information may include:</text:p>
      <text:list xml:id="list1659980665301543270" text:style-name="L5">
        <text:list-item>
          <text:p text:style-name="P5">Open-source licenses</text:p>
        </text:list-item>
        <text:list-item>
          <text:p text:style-name="P5">Copyright notices</text:p>
        </text:list-item>
        <text:list-item>
          <text:p text:style-name="P5">Source code availability where required by license terms</text:p>
        </text:list-item>
        <text:list-item>
          <text:p text:style-name="P5">References to applicable repositories</text:p>
        </text:list-item>
      </text:list>
      <text:h text:style-name="Heading_20_1" text:outline-level="1">10. Website Availability</text:h>
      <text:p text:style-name="Text_20_body"/>
      <text:p text:style-name="Text_20_body">The manufacturer should make reasonable efforts to ensure that the security information remains accessible throughout the supported lifetime of the product.</text:p>
      <text:p text:style-name="Text_20_body">Temporary interruptions due to maintenance or technical issues do not constitute non-compliance, provided that the information is restored within a reasonable time.</text:p>
      <text:h text:style-name="Heading_20_1" text:outline-level="1">11. Review and Maintenance</text:h>
      <text:p text:style-name="Text_20_body"/>
      <text:p text:style-name="Text_20_body">The published website information should be reviewed whenever:</text:p>
      <text:list xml:id="list5479134975413593427" text:style-name="L6">
        <text:list-item>
          <text:p text:style-name="P6">a new firmware version is released;</text:p>
        </text:list-item>
        <text:list-item>
          <text:p text:style-name="P6">the support status of a product changes;</text:p>
        </text:list-item>
        <text:list-item>
          <text:p text:style-name="P6">a Security Advisory is published;</text:p>
        </text:list-item>
        <text:list-item>
          <text:p text:style-name="P6">contact information changes;</text:p>
        </text:list-item>
        <text:list-item>
          <text:p text:style-name="P6">the Vulnerability Disclosure Policy is updated.</text:p>
        </text:list-item>
      </text:list>
      <text:h text:style-name="Heading_20_1" text:outline-level="1">Document History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Version</text:p>
            </table:table-cell>
            <table:table-cell table:style-name="Table4.A1" office:value-type="string">
              <text:p text:style-name="Table_20_Heading">Dat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1.0</text:p>
          </table:table-cell>
          <table:table-cell table:style-name="Table4.A1" office:value-type="string">
            <text:p text:style-name="Table_20_Contents">[Date]</text:p>
          </table:table-cell>
          <table:table-cell table:style-name="Table4.A1" office:value-type="string">
            <text:p text:style-name="Table_20_Contents">Initial Draf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Radonic</meta:initial-creator>
    <meta:creation-date>2026-07-06T11:11:35.49</meta:creation-date>
    <dc:date>2026-07-06T11:16:11.95</dc:date>
    <dc:creator>Boris Radonic</dc:creator>
    <meta:editing-duration>PT4M35S</meta:editing-duration>
    <meta:editing-cycles>3</meta:editing-cycles>
    <meta:generator>OpenOffice/4.1.16$Win32 OpenOffice.org_project/4116m3$Build-9816</meta:generator>
    <meta:document-statistic meta:table-count="4" meta:image-count="0" meta:object-count="0" meta:page-count="4" meta:paragraph-count="105" meta:word-count="519" meta:character-count="3792"/>
  </office:meta>
</office:document-meta>
</file>
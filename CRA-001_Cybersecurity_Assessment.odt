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0.38cm" table:align="left"/>
    </style:style>
    <style:style style:name="Table1.A" style:family="table-column">
      <style:table-column-properties style:column-width="3.674cm"/>
    </style:style>
    <style:style style:name="Table1.B" style:family="table-column">
      <style:table-column-properties style:column-width="6.706cm"/>
    </style:style>
    <style:style style:name="Table1.A1" style:family="table-cell">
      <style:table-cell-properties style:vertical-align="middle" fo:padding="0.049cm" fo:border="none"/>
    </style:style>
    <style:style style:name="Table2" style:family="table">
      <style:table-properties style:width="12.963cm" table:align="left"/>
    </style:style>
    <style:style style:name="Table2.A" style:family="table-column">
      <style:table-column-properties style:column-width="2.252cm"/>
    </style:style>
    <style:style style:name="Table2.B" style:family="table-column">
      <style:table-column-properties style:column-width="4.2cm"/>
    </style:style>
    <style:style style:name="Table2.C" style:family="table-column">
      <style:table-column-properties style:column-width="6.511cm"/>
    </style:style>
    <style:style style:name="Table2.A1" style:family="table-cell">
      <style:table-cell-properties style:vertical-align="middle" fo:padding="0.049cm" fo:border="none"/>
    </style:style>
    <style:style style:name="Table3" style:family="table">
      <style:table-properties style:width="7.507cm" table:align="left"/>
    </style:style>
    <style:style style:name="Table3.A" style:family="table-column">
      <style:table-column-properties style:column-width="4.302cm"/>
    </style:style>
    <style:style style:name="Table3.B" style:family="table-column">
      <style:table-column-properties style:column-width="3.205cm"/>
    </style:style>
    <style:style style:name="Table3.A1" style:family="table-cell">
      <style:table-cell-properties style:vertical-align="middle" fo:padding="0.049cm" fo:border="none"/>
    </style:style>
    <style:style style:name="Table4" style:family="table">
      <style:table-properties style:width="14.19cm" table:align="left"/>
    </style:style>
    <style:style style:name="Table4.A" style:family="table-column">
      <style:table-column-properties style:column-width="6.248cm"/>
    </style:style>
    <style:style style:name="Table4.B" style:family="table-column">
      <style:table-column-properties style:column-width="7.943cm"/>
    </style:style>
    <style:style style:name="Table4.A1" style:family="table-cell">
      <style:table-cell-properties style:vertical-align="middle" fo:padding="0.049cm" fo:border="none"/>
    </style:style>
    <style:style style:name="Table5" style:family="table">
      <style:table-properties style:width="14.026cm" fo:margin-left="0.453cm" fo:margin-right="2.521cm" table:align="margins"/>
    </style:style>
    <style:style style:name="Table5.A" style:family="table-column">
      <style:table-column-properties style:column-width="2.117cm" style:rel-column-width="1200*"/>
    </style:style>
    <style:style style:name="Table5.B" style:family="table-column">
      <style:table-column-properties style:column-width="11.91cm" style:rel-column-width="6752*"/>
    </style:style>
    <style:style style:name="Table5.A1" style:family="table-cell">
      <style:table-cell-properties style:vertical-align="middle" fo:padding="0.049cm" fo:border="none"/>
    </style:style>
    <style:style style:name="Table6" style:family="table">
      <style:table-properties style:width="8.25cm" table:align="left"/>
    </style:style>
    <style:style style:name="Table6.A" style:family="table-column">
      <style:table-column-properties style:column-width="5.546cm"/>
    </style:style>
    <style:style style:name="Table6.B" style:family="table-column">
      <style:table-column-properties style:column-width="2.704cm"/>
    </style:style>
    <style:style style:name="Table6.A1" style:family="table-cell">
      <style:table-cell-properties style:vertical-align="middle" fo:padding="0.049cm" fo:border="none"/>
    </style:style>
    <style:style style:name="Table7" style:family="table">
      <style:table-properties style:width="9.737cm" table:align="left"/>
    </style:style>
    <style:style style:name="Table7.A" style:family="table-column">
      <style:table-column-properties style:column-width="6.916cm"/>
    </style:style>
    <style:style style:name="Table7.B" style:family="table-column">
      <style:table-column-properties style:column-width="2.82cm"/>
    </style:style>
    <style:style style:name="Table7.A1" style:family="table-cell">
      <style:table-cell-properties style:vertical-align="middle" fo:padding="0.049cm" fo:border="none"/>
    </style:style>
    <style:style style:name="P1" style:family="paragraph" style:parent-style-name="Text_20_body" style:list-style-name="L32"/>
    <style:style style:name="P2" style:family="paragraph" style:parent-style-name="Text_20_body" style:list-style-name="L33"/>
    <style:style style:name="P3" style:family="paragraph" style:parent-style-name="Text_20_body" style:list-style-name="L35"/>
    <style:style style:name="P4" style:family="paragraph" style:parent-style-name="Text_20_body" style:list-style-name="L36"/>
    <style:style style:name="P5" style:family="paragraph" style:parent-style-name="Text_20_body" style:list-style-name="L37"/>
    <style:style style:name="P6" style:family="paragraph" style:parent-style-name="Text_20_body" style:list-style-name="L38"/>
    <style:style style:name="P7" style:family="paragraph" style:parent-style-name="Text_20_body" style:list-style-name="L39"/>
    <style:style style:name="P8" style:family="paragraph" style:parent-style-name="Text_20_body" style:list-style-name="L40"/>
    <style:style style:name="P9" style:family="paragraph" style:parent-style-name="Text_20_body" style:list-style-name="L34">
      <style:text-properties fo:background-color="#ffff00"/>
    </style:style>
    <style:style style:name="P10" style:family="paragraph" style:parent-style-name="Text_20_body" style:list-style-name="L32">
      <style:paragraph-properties fo:margin-top="0cm" fo:margin-bottom="0cm"/>
    </style:style>
    <style:style style:name="P11" style:family="paragraph" style:parent-style-name="Text_20_body" style:list-style-name="L33">
      <style:paragraph-properties fo:margin-top="0cm" fo:margin-bottom="0cm"/>
    </style:style>
    <style:style style:name="P12" style:family="paragraph" style:parent-style-name="Text_20_body" style:list-style-name="L34">
      <style:paragraph-properties fo:margin-top="0cm" fo:margin-bottom="0cm"/>
    </style:style>
    <style:style style:name="P13" style:family="paragraph" style:parent-style-name="Text_20_body" style:list-style-name="L35">
      <style:paragraph-properties fo:margin-top="0cm" fo:margin-bottom="0cm"/>
    </style:style>
    <style:style style:name="P14" style:family="paragraph" style:parent-style-name="Text_20_body" style:list-style-name="L36">
      <style:paragraph-properties fo:margin-top="0cm" fo:margin-bottom="0cm"/>
    </style:style>
    <style:style style:name="P15" style:family="paragraph" style:parent-style-name="Text_20_body" style:list-style-name="L37">
      <style:paragraph-properties fo:margin-top="0cm" fo:margin-bottom="0cm"/>
    </style:style>
    <style:style style:name="P16" style:family="paragraph" style:parent-style-name="Text_20_body" style:list-style-name="L38">
      <style:paragraph-properties fo:margin-top="0cm" fo:margin-bottom="0cm"/>
    </style:style>
    <style:style style:name="P17" style:family="paragraph" style:parent-style-name="Text_20_body" style:list-style-name="L39">
      <style:paragraph-properties fo:margin-top="0cm" fo:margin-bottom="0cm"/>
    </style:style>
    <style:style style:name="P18" style:family="paragraph" style:parent-style-name="Text_20_body" style:list-style-name="L40">
      <style:paragraph-properties fo:margin-top="0cm" fo:margin-bottom="0cm"/>
    </style:style>
    <style:style style:name="P19" style:family="paragraph" style:parent-style-name="Text_20_body">
      <style:paragraph-properties fo:break-before="page"/>
    </style:style>
    <style:style style:name="P20" style:family="paragraph" style:parent-style-name="Heading_20_1">
      <style:paragraph-properties fo:break-before="pag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ybersecurity Assessment</text:h>
      <text:h text:style-name="Heading_20_2" text:outline-level="2">Industrial Servo Controller</text:h>
      <text:p text:style-name="Text_20_body"><text:span text:style-name="Strong_20_Emphasis">Document ID:</text:span> CRA-001</text:p>
      <text:p text:style-name="Text_20_body"><text:span text:style-name="Strong_20_Emphasis">Version:</text:span> 0.2</text:p>
      <text:p text:style-name="Text_20_body"><text:span text:style-name="Strong_20_Emphasis">Status:</text:span> Draft</text:p>
      <text:p text:style-name="Text_20_body"><text:span text:style-name="Strong_20_Emphasis">Language:</text:span> English</text:p>
      <text:p text:style-name="Text_20_body"/>
      <text:h text:style-name="Heading_20_1" text:outline-level="1">1. Purpose</text:h>
      <text:p text:style-name="Text_20_body"/>
      <text:p text:style-name="Text_20_body">This document provides a cybersecurity risk assessment for an industrial servo controller intended for robotics and industrial automation.</text:p>
      <text:p text:style-name="Text_20_body">Its purpose is to identify realistic cybersecurity risks associated with the product, evaluate their relevance within the intended operating environment and document the reasoning used to determine the residual cybersecurity risk.</text:p>
      <text:p text:style-name="Text_20_body">This document is an engineering assessment. It is not a product specification, software design specification or implementation guideline.</text:p>
      <text:h text:style-name="Heading_20_1" text:outline-level="1">2. Product Description</text:h>
      <text:p text:style-name="Text_20_body"/>
      <text:p text:style-name="Text_20_body">The assessed product is an industrial servo controller designed to control permanent magnet synchronous motors (PMSM) and brushless DC motors (BLDC).</text:p>
      <text:p text:style-name="Text_20_body">The controller forms part of a larger industrial automation system and operates under the supervision of a higher-level motion controller.</text:p>
      <text:p text:style-name="Text_20_body">Its primary purpose is deterministic real-time motor control.</text:p>
      <text:p text:style-name="Text_20_body">The product is not intended to operate as a general-purpose computing platform or as an Internet-connected device.</text:p>
      <text:h text:style-name="Heading_20_1" text:outline-level="1">3. Intended Operating Environment</text:h>
      <text:p text:style-name="Text_20_body"/>
      <text:p text:style-name="Text_20_body">The controller is intended to be permanently installed inside an industrial electrical cabinet or machine enclosure.</text:p>
      <text:p text:style-name="Text_20_body">During normal operation the product is not directly accessible to operators.</text:p>
      <text:p text:style-name="Text_20_body">Installation, commissioning and maintenance are expected to be performed only by qualified personnel.</text:p>
      <text:p text:style-name="Text_20_body">The cybersecurity assessment presented in this document is based on this intended operating environment.</text:p>
      <text:p text:style-name="Text_20_body">If the product is deployed outside this environment, additional cybersecurity measures may be appropriate.</text:p>
      <text:h text:style-name="Heading_20_1" text:outline-level="1"><text:soft-page-break/>4. Product Interfaces</text:h>
      <text:p text:style-name="Text_20_body"/>
      <text:p text:style-name="Text_20_body">The assessed product provides only the interfaces required for its intended industrial application.</text:p>
      <table:table table:name="Table1" table:style-name="Table1">
        <table:table-column table:style-name="Table1.A"/>
        <table:table-column table:style-name="Table1.B"/>
        <table:table-header-rows>
          <table:table-row>
            <table:table-cell table:style-name="Table1.A1" office:value-type="string">
              <text:p text:style-name="Table_20_Heading">Interface</text:p>
            </table:table-cell>
            <table:table-cell table:style-name="Table1.A1" office:value-type="string">
              <text:p text:style-name="Table_20_Heading">Intended Purpose</text:p>
            </table:table-cell>
          </table:table-row>
        </table:table-header-rows>
        <table:table-row>
          <table:table-cell table:style-name="Table1.A1" office:value-type="string">
            <text:p text:style-name="Table_20_Contents">CAN-FD</text:p>
          </table:table-cell>
          <table:table-cell table:style-name="Table1.A1" office:value-type="string">
            <text:p text:style-name="Table_20_Contents">Communication with motion controller</text:p>
          </table:table-cell>
        </table:table-row>
        <table:table-row>
          <table:table-cell table:style-name="Table1.A1" office:value-type="string">
            <text:p text:style-name="Table_20_Contents">RS-232</text:p>
          </table:table-cell>
          <table:table-cell table:style-name="Table1.A1" office:value-type="string">
            <text:p text:style-name="Table_20_Contents">Local diagnostics and service</text:p>
          </table:table-cell>
        </table:table-row>
        <table:table-row>
          <table:table-cell table:style-name="Table1.A1" office:value-type="string">
            <text:p text:style-name="Table_20_Contents">SWD/JTAG</text:p>
          </table:table-cell>
          <table:table-cell table:style-name="Table1.A1" office:value-type="string">
            <text:p text:style-name="Table_20_Contents">Manufacturing and service</text:p>
          </table:table-cell>
        </table:table-row>
        <table:table-row>
          <table:table-cell table:style-name="Table1.A1" office:value-type="string">
            <text:p text:style-name="Table_20_Contents">Incremental Encoder</text:p>
          </table:table-cell>
          <table:table-cell table:style-name="Table1.A1" office:value-type="string">
            <text:p text:style-name="Table_20_Contents">Position feedback</text:p>
          </table:table-cell>
        </table:table-row>
        <table:table-row>
          <table:table-cell table:style-name="Table1.A1" office:value-type="string">
            <text:p text:style-name="Table_20_Contents">Hall Inputs</text:p>
          </table:table-cell>
          <table:table-cell table:style-name="Table1.A1" office:value-type="string">
            <text:p text:style-name="Table_20_Contents">Motor feedback</text:p>
          </table:table-cell>
        </table:table-row>
        <table:table-row>
          <table:table-cell table:style-name="Table1.A1" office:value-type="string">
            <text:p text:style-name="Table_20_Contents">Digital Inputs</text:p>
          </table:table-cell>
          <table:table-cell table:style-name="Table1.A1" office:value-type="string">
            <text:p text:style-name="Table_20_Contents">Local control signals</text:p>
          </table:table-cell>
        </table:table-row>
      </table:table>
      <text:p text:style-name="Text_20_body">The product does not implement Ethernet, Wi-Fi, Bluetooth, NFC, cellular communication or any other technology intended for communication over public networks.</text:p>
      <text:h text:style-name="Heading_20_1" text:outline-level="1">5. Cybersecurity Context</text:h>
      <text:p text:style-name="Text_20_body"/>
      <text:p text:style-name="Text_20_body">Unlike many consumer and IoT products, the assessed controller is not designed to communicate with Internet services.</text:p>
      <text:p text:style-name="Text_20_body">No remote management functionality is provided.</text:p>
      <text:p text:style-name="Text_20_body">No cloud services are used.</text:p>
      <text:p text:style-name="Text_20_body">No wireless communication interfaces are implemented.</text:p>
      <text:p text:style-name="Text_20_body">As a consequence, the controller cannot be reached directly from external networks during normal operation.</text:p>
      <text:p text:style-name="Text_20_body">This significantly limits the opportunities for remote cyber attacks.</text:p>
      <text:p text:style-name="Text_20_body">The remaining cybersecurity exposure is primarily associated with physical access and locally connected service interfaces.</text:p>
      <text:p text:style-name="Text_20_body"/>
      <text:h text:style-name="Heading_20_1" text:outline-level="1">6. Assets Considered During the Assessment</text:h>
      <text:p text:style-name="Text_20_body">The following assets have been considered relevant from a cybersecurity perspective:</text:p>
      <text:list xml:id="list4596144300477329475" text:style-name="L32">
        <text:list-item>
          <text:p text:style-name="P10">Application firmware </text:p>
        </text:list-item>
        <text:list-item>
          <text:p text:style-name="P10">Bootloader (if present) </text:p>
        </text:list-item>
        <text:list-item>
          <text:p text:style-name="P10">Configuration parameters </text:p>
        </text:list-item>
        <text:list-item>
          <text:p text:style-name="P10">Calibration data </text:p>
        </text:list-item>
        <text:list-item>
          <text:p text:style-name="P10">Diagnostic information </text:p>
        </text:list-item>
        <text:list-item>
          <text:p text:style-name="P10">Motor control functionality </text:p>
        </text:list-item>
        <text:list-item>
          <text:p text:style-name="P1">Safety-related operating parameters </text:p>
        </text:list-item>
      </text:list>
      <text:p text:style-name="Text_20_body">No personal data is processed, stored or transmitted by the controller.</text:p>
      <text:p text:style-name="Text_20_body"/>
      <text:h text:style-name="Heading_20_1" text:outline-level="1"><text:soft-page-break/>7. Initial Cybersecurity Assessment</text:h>
      <text:p text:style-name="Text_20_body">The product architecture intentionally limits external connectivity.</text:p>
      <text:p text:style-name="Text_20_body">From a cybersecurity perspective, this architectural decision substantially reduces the attack surface compared with products that permanently communicate with external networks.</text:p>
      <text:p text:style-name="Text_20_body">The absence of Internet connectivity eliminates many common attack scenarios, including attacks against web services, remote administration interfaces, cloud services and wireless communication protocols.</text:p>
      <text:p text:style-name="Text_20_body">This does not mean that the product is immune to cyber attacks.</text:p>
      <text:p text:style-name="Text_20_body">Instead, it means that the assessment should focus on realistic attack vectors that remain possible within the intended operating environment.</text:p>
      <text:p text:style-name="Text_20_body">Consequently, the following areas will be evaluated in the remainder of this document:</text:p>
      <text:list xml:id="list7718468076111704891" text:style-name="L33">
        <text:list-item>
          <text:p text:style-name="P11">Physical access </text:p>
        </text:list-item>
        <text:list-item>
          <text:p text:style-name="P11">Local communication interfaces </text:p>
        </text:list-item>
        <text:list-item>
          <text:p text:style-name="P11">Firmware update process </text:p>
        </text:list-item>
        <text:list-item>
          <text:p text:style-name="P11">Configuration management </text:p>
        </text:list-item>
        <text:list-item>
          <text:p text:style-name="P2">Diagnostic functions </text:p>
        </text:list-item>
      </text:list>
      <text:p text:style-name="Text_20_body">Threats requiring technologies that are not implemented by the product will be identified and documented as <text:span text:style-name="Strong_20_Emphasis">Not Applicable</text:span>, together with the justification for that conclusion.</text:p>
      <text:h text:style-name="Heading_20_1" text:outline-level="1">8. Cybersecurity Assumptions</text:h>
      <text:p text:style-name="Text_20_body">The conclusions presented in this assessment are based on the intended use of the product and on a number of assumptions regarding its operating environment.</text:p>
      <text:p text:style-name="Text_20_body">These assumptions define the context within which the identified cybersecurity risks have been evaluated.</text:p>
      <text:p text:style-name="Text_20_body">Should the product be used outside this context, the assessment may no longer be valid and additional cybersecurity measures may become necessary.</text:p>
      <text:p text:style-name="Text_20_body">The following assumptions have been made:</text:p>
      <text:list xml:id="list8175630586611990286" text:style-name="L34">
        <text:list-item>
          <text:p text:style-name="P12">The controller is installed inside an industrial electrical cabinet or machine enclosure. </text:p>
        </text:list-item>
        <text:list-item>
          <text:p text:style-name="P12">Access to the electrical cabinet is restricted to authorized personnel. </text:p>
        </text:list-item>
        <text:list-item>
          <text:p text:style-name="P12">The industrial installation is commissioned and maintained by qualified personnel. </text:p>
        </text:list-item>
        <text:list-item>
          <text:p text:style-name="P12">The controller communicates only with equipment belonging to the same industrial installation. </text:p>
        </text:list-item>
        <text:list-item>
          <text:p text:style-name="P12">Firmware updates are performed only during commissioning or scheduled maintenance. </text:p>
        </text:list-item>
        <text:list-item>
          <text:p text:style-name="P12">The product is not directly connected to the public Internet. </text:p>
        </text:list-item>
        <text:list-item>
          <text:p text:style-name="P12">The product is not intended to operate as an IoT device. </text:p>
        </text:list-item>
        <text:list-item>
          <text:p text:style-name="P9">The product is not intended for consumer use. </text:p>
        </text:list-item>
      </text:list>
      <text:p text:style-name="Text_20_body">These assumptions are considered reasonable for the intended industrial application.</text:p>
      <text:p text:style-name="P19"/>
      <text:h text:style-name="Heading_20_1" text:outline-level="1">9. Product Attack Surface</text:h>
      <text:h text:style-name="Heading_20_2" text:outline-level="2">9.1 General</text:h>
      <text:p text:style-name="Text_20_body"/>
      <text:p text:style-name="Text_20_body">The attack surface of a product consists of all interfaces through which an attacker may intentionally or unintentionally influence the behaviour of the device.</text:p>
      <text:p text:style-name="Text_20_body">For the assessed product, the attack surface has intentionally been kept small by limiting external connectivity to the interfaces required for the intended application.</text:p>
      <text:p text:style-name="Text_20_body">This design reduces both software complexity and the number of potential attack vectors.</text:p>
      <text:h text:style-name="Heading_20_2" text:outline-level="2">9.2 External Interfaces</text:h>
      <text:p text:style-name="Text_20_body"/>
      <text:p text:style-name="Text_20_body">The following interfaces may receive externally supplied informatio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Interface</text:p>
            </table:table-cell>
            <table:table-cell table:style-name="Table2.A1" office:value-type="string">
              <text:p text:style-name="Table_20_Heading">Normal Operation</text:p>
            </table:table-cell>
            <table:table-cell table:style-name="Table2.A1" office:value-type="string">
              <text:p text:style-name="Table_20_Heading">Accessible without Physical Access</text:p>
            </table:table-cell>
          </table:table-row>
        </table:table-header-rows>
        <table:table-row>
          <table:table-cell table:style-name="Table2.A1" office:value-type="string">
            <text:p text:style-name="Table_20_Contents">CAN-FD</text:p>
          </table:table-cell>
          <table:table-cell table:style-name="Table2.A1" office:value-type="string">
            <text:p text:style-name="Table_20_Contents">Yes</text:p>
          </table:table-cell>
          <table:table-cell table:style-name="Table2.A1" office:value-type="string">
            <text:p text:style-name="Table_20_Contents">No</text:p>
          </table:table-cell>
        </table:table-row>
        <table:table-row>
          <table:table-cell table:style-name="Table2.A1" office:value-type="string">
            <text:p text:style-name="Table_20_Contents">RS-232</text:p>
          </table:table-cell>
          <table:table-cell table:style-name="Table2.A1" office:value-type="string">
            <text:p text:style-name="Table_20_Contents">Service only</text:p>
          </table:table-cell>
          <table:table-cell table:style-name="Table2.A1" office:value-type="string">
            <text:p text:style-name="Table_20_Contents">No</text:p>
          </table:table-cell>
        </table:table-row>
        <table:table-row>
          <table:table-cell table:style-name="Table2.A1" office:value-type="string">
            <text:p text:style-name="Table_20_Contents">SWD/JTAG</text:p>
          </table:table-cell>
          <table:table-cell table:style-name="Table2.A1" office:value-type="string">
            <text:p text:style-name="Table_20_Contents">Manufacturing / Service</text:p>
          </table:table-cell>
          <table:table-cell table:style-name="Table2.A1" office:value-type="string">
            <text:p text:style-name="Table_20_Contents">No</text:p>
          </table:table-cell>
        </table:table-row>
      </table:table>
      <text:p text:style-name="Text_20_body">No other communication interfaces are provided.</text:p>
      <text:h text:style-name="Heading_20_2" text:outline-level="2">9.3 Interfaces Not Implemented</text:h>
      <text:p text:style-name="Text_20_body"/>
      <text:p text:style-name="Text_20_body">The assessed product does not implement the following technologies.</text:p>
      <table:table table:name="Table3" table:style-name="Table3">
        <table:table-column table:style-name="Table3.A"/>
        <table:table-column table:style-name="Table3.B"/>
        <table:table-header-rows>
          <table:table-row>
            <table:table-cell table:style-name="Table3.A1" office:value-type="string">
              <text:p text:style-name="Table_20_Heading">Technology</text:p>
            </table:table-cell>
            <table:table-cell table:style-name="Table3.A1" office:value-type="string">
              <text:p text:style-name="Table_20_Heading">Assessment</text:p>
            </table:table-cell>
          </table:table-row>
        </table:table-header-rows>
        <table:table-row>
          <table:table-cell table:style-name="Table3.A1" office:value-type="string">
            <text:p text:style-name="Table_20_Contents">Ethernet</text:p>
          </table:table-cell>
          <table:table-cell table:style-name="Table3.A1" office:value-type="string">
            <text:p text:style-name="Table_20_Contents">Not Implemented</text:p>
          </table:table-cell>
        </table:table-row>
        <table:table-row>
          <table:table-cell table:style-name="Table3.A1" office:value-type="string">
            <text:p text:style-name="Table_20_Contents">Wi-Fi</text:p>
          </table:table-cell>
          <table:table-cell table:style-name="Table3.A1" office:value-type="string">
            <text:p text:style-name="Table_20_Contents">Not Implemented</text:p>
          </table:table-cell>
        </table:table-row>
        <table:table-row>
          <table:table-cell table:style-name="Table3.A1" office:value-type="string">
            <text:p text:style-name="Table_20_Contents">Bluetooth</text:p>
          </table:table-cell>
          <table:table-cell table:style-name="Table3.A1" office:value-type="string">
            <text:p text:style-name="Table_20_Contents">Not Implemented</text:p>
          </table:table-cell>
        </table:table-row>
        <table:table-row>
          <table:table-cell table:style-name="Table3.A1" office:value-type="string">
            <text:p text:style-name="Table_20_Contents">NFC</text:p>
          </table:table-cell>
          <table:table-cell table:style-name="Table3.A1" office:value-type="string">
            <text:p text:style-name="Table_20_Contents">Not Implemented</text:p>
          </table:table-cell>
        </table:table-row>
        <table:table-row>
          <table:table-cell table:style-name="Table3.A1" office:value-type="string">
            <text:p text:style-name="Table_20_Contents">Cellular Communication</text:p>
          </table:table-cell>
          <table:table-cell table:style-name="Table3.A1" office:value-type="string">
            <text:p text:style-name="Table_20_Contents">Not Implemented</text:p>
          </table:table-cell>
        </table:table-row>
        <table:table-row>
          <table:table-cell table:style-name="Table3.A1" office:value-type="string">
            <text:p text:style-name="Table_20_Contents">USB Host</text:p>
          </table:table-cell>
          <table:table-cell table:style-name="Table3.A1" office:value-type="string">
            <text:p text:style-name="Table_20_Contents">Not Implemented</text:p>
          </table:table-cell>
        </table:table-row>
        <table:table-row>
          <table:table-cell table:style-name="Table3.A1" office:value-type="string">
            <text:p text:style-name="Table_20_Contents">Web Server</text:p>
          </table:table-cell>
          <table:table-cell table:style-name="Table3.A1" office:value-type="string">
            <text:p text:style-name="Table_20_Contents">Not Implemented</text:p>
          </table:table-cell>
        </table:table-row>
        <table:table-row>
          <table:table-cell table:style-name="Table3.A1" office:value-type="string">
            <text:p text:style-name="Table_20_Contents">FTP</text:p>
          </table:table-cell>
          <table:table-cell table:style-name="Table3.A1" office:value-type="string">
            <text:p text:style-name="Table_20_Contents">Not Implemented</text:p>
          </table:table-cell>
        </table:table-row>
        <table:table-row>
          <table:table-cell table:style-name="Table3.A1" office:value-type="string">
            <text:p text:style-name="Table_20_Contents">SSH</text:p>
          </table:table-cell>
          <table:table-cell table:style-name="Table3.A1" office:value-type="string">
            <text:p text:style-name="Table_20_Contents">Not Implemented</text:p>
          </table:table-cell>
        </table:table-row>
        <table:table-row>
          <table:table-cell table:style-name="Table3.A1" office:value-type="string">
            <text:p text:style-name="Table_20_Contents">Telnet</text:p>
          </table:table-cell>
          <table:table-cell table:style-name="Table3.A1" office:value-type="string">
            <text:p text:style-name="Table_20_Contents">Not Implemented</text:p>
          </table:table-cell>
        </table:table-row>
        <table:table-row>
          <table:table-cell table:style-name="Table3.A1" office:value-type="string">
            <text:p text:style-name="Table_20_Contents">MQTT</text:p>
          </table:table-cell>
          <table:table-cell table:style-name="Table3.A1" office:value-type="string">
            <text:p text:style-name="Table_20_Contents">Not Implemented</text:p>
          </table:table-cell>
        </table:table-row>
        <table:table-row>
          <table:table-cell table:style-name="Table3.A1" office:value-type="string">
            <text:p text:style-name="Table_20_Contents">Cloud Connectivity</text:p>
          </table:table-cell>
          <table:table-cell table:style-name="Table3.A1" office:value-type="string">
            <text:p text:style-name="Table_20_Contents">Not Implemented</text:p>
          </table:table-cell>
        </table:table-row>
      </table:table>
      <text:p text:style-name="Text_20_body"/>
      <text:p text:style-name="Text_20_body">The absence of these technologies eliminates numerous attack scenarios commonly associated with Internet-connected products.</text:p>
      <text:p text:style-name="Text_20_body"/>
      <text:h text:style-name="Heading_20_1" text:outline-level="1"><text:soft-page-break/>10. Threat Identification</text:h>
      <text:p text:style-name="Text_20_body"/>
      <text:p text:style-name="Text_20_body">The objective of this chapter is to identify cybersecurity threats that are reasonably foreseeable for the assessed product.</text:p>
      <text:p text:style-name="Text_20_body">Threat identification has been based on:</text:p>
      <text:list xml:id="list4531210839417087084" text:style-name="L35">
        <text:list-item>
          <text:p text:style-name="P13">product architecture; </text:p>
        </text:list-item>
        <text:list-item>
          <text:p text:style-name="P13">intended operating environment; </text:p>
        </text:list-item>
        <text:list-item>
          <text:p text:style-name="P13">communication interfaces; </text:p>
        </text:list-item>
        <text:list-item>
          <text:p text:style-name="P13">maintenance procedures; </text:p>
        </text:list-item>
        <text:list-item>
          <text:p text:style-name="P3">publicly known attack techniques applicable to industrial embedded devices. </text:p>
        </text:list-item>
      </text:list>
      <text:p text:style-name="Text_20_body">Only threats considered technically feasible have been included in the risk assessment.</text:p>
      <text:p text:style-name="Text_20_body">Threats requiring technologies not implemented by the product have been documented separately as <text:span text:style-name="Strong_20_Emphasis">Not Applicable</text:span>.</text:p>
      <text:p text:style-name="Text_20_body"/>
      <text:h text:style-name="Heading_20_1" text:outline-level="1">10.1 Physical Access</text:h>
      <text:h text:style-name="Heading_20_3" text:outline-level="3">Observation</text:h>
      <text:p text:style-name="Text_20_body">Modification of the controller requires physical access to the installation.</text:p>
      <text:h text:style-name="Heading_20_3" text:outline-level="3">Assessment</text:h>
      <text:p text:style-name="Text_20_body">Physical access represents the primary prerequisite for most cybersecurity threats affecting this product.</text:p>
      <text:p text:style-name="Text_20_body">Consequently, physical protection of the installation forms an important organizational security measure.</text:p>
      <text:h text:style-name="Heading_20_3" text:outline-level="3">Conclusion</text:h>
      <text:p text:style-name="Text_20_body">The probability of unauthorized physical access depends primarily on the installation environment rather than on the controller itself.</text:p>
      <text:h text:style-name="Heading_20_1" text:outline-level="1">10.2 CAN Communication</text:h>
      <text:h text:style-name="Heading_20_3" text:outline-level="3">Observation</text:h>
      <text:p text:style-name="Text_20_body">The controller exchanges operational information with the motion controller through a CAN-FD network.</text:p>
      <text:h text:style-name="Heading_20_3" text:outline-level="3">Assessment</text:h>
      <text:p text:style-name="Text_20_body">An attacker with physical access to the CAN network could potentially transmit arbitrary CAN messages.</text:p>
      <text:p text:style-name="Text_20_body">The practical feasibility of such an attack depends on physical access to the industrial installation.</text:p>
      <text:p text:style-name="Text_20_body">No direct remote attack path exists.</text:p>
      <text:h text:style-name="Heading_20_3" text:outline-level="3"><text:soft-page-break/>Conclusion</text:h>
      <text:p text:style-name="Text_20_body">The associated cybersecurity risk is considered limited by the intended operating environment.</text:p>
      <text:h text:style-name="Heading_20_1" text:outline-level="1">10.3 RS-232 Service Interface</text:h>
      <text:h text:style-name="Heading_20_3" text:outline-level="3">Observation</text:h>
      <text:p text:style-name="Text_20_body">The RS-232 interface is intended for commissioning, diagnostics and maintenance.</text:p>
      <text:h text:style-name="Heading_20_3" text:outline-level="3">Assessment</text:h>
      <text:p text:style-name="Text_20_body">Use of this interface requires direct physical connection to the controller.</text:p>
      <text:p text:style-name="Text_20_body">Consequently, exploitation requires physical presence at the installation.</text:p>
      <text:h text:style-name="Heading_20_3" text:outline-level="3">Conclusion</text:h>
      <text:p text:style-name="Text_20_body">The cybersecurity exposure associated with the RS-232 interface is considered low during normal operation because the interface is not continuously connected.</text:p>
      <text:p text:style-name="Text_20_body"/>
      <text:h text:style-name="Heading_20_1" text:outline-level="1">10.4 Firmware Update</text:h>
      <text:h text:style-name="Heading_20_3" text:outline-level="3">Observation</text:h>
      <text:p text:style-name="Text_20_body">Firmware modifications are performed through locally connected service interfaces.</text:p>
      <text:h text:style-name="Heading_20_3" text:outline-level="3">Assessment</text:h>
      <text:p text:style-name="Text_20_body">Firmware updates represent one of the few mechanisms capable of intentionally changing product behaviour after deployment.</text:p>
      <text:p text:style-name="Text_20_body">However, the update process requires direct physical access and is expected to occur only during planned maintenance activities.</text:p>
      <text:p text:style-name="Text_20_body">The resulting exposure is therefore substantially different from products supporting remote software updates over public communication networks.</text:p>
      <text:h text:style-name="Heading_20_3" text:outline-level="3">Conclusion</text:h>
      <text:p text:style-name="Text_20_body">Within the intended operating environment, the likelihood of unauthorized firmware modification is considered low.</text:p>
      <text:p text:style-name="Text_20_body"/>
      <text:p text:style-name="Text_20_body"/>
      <text:p text:style-name="Text_20_body"/>
      <text:h text:style-name="Heading_20_1" text:outline-level="1"><text:soft-page-break/>10.5 Diagnostic Functions</text:h>
      <text:h text:style-name="Heading_20_3" text:outline-level="3">Observation</text:h>
      <text:p text:style-name="Text_20_body">Diagnostic functions are intended to assist commissioning and maintenance.</text:p>
      <text:h text:style-name="Heading_20_3" text:outline-level="3">Assessment</text:h>
      <text:p text:style-name="Text_20_body">Diagnostic information may provide insight into the operational state of the controller.</text:p>
      <text:p text:style-name="Text_20_body">The assessed product does not process personal information, financial information or confidential user data.</text:p>
      <text:p text:style-name="Text_20_body">Consequently, disclosure of diagnostic information is not expected to create significant cybersecurity consequences.</text:p>
      <text:h text:style-name="Heading_20_3" text:outline-level="3">Conclusion</text:h>
      <text:p text:style-name="Text_20_body">The associated cybersecurity risk is considered low.</text:p>
      <text:p text:style-name="Text_20_body"/>
      <text:h text:style-name="P20" text:outline-level="1">11. Threats Considered Not Applicable</text:h>
      <text:p text:style-name="Text_20_body"/>
      <text:p text:style-name="Text_20_body">The following cybersecurity threats have been evaluated and determined to be not applicable to the assessed product.</text:p>
      <table:table table:name="Table4" table:style-name="Table4">
        <table:table-column table:style-name="Table4.A"/>
        <table:table-column table:style-name="Table4.B"/>
        <table:table-header-rows>
          <table:table-row>
            <table:table-cell table:style-name="Table4.A1" office:value-type="string">
              <text:p text:style-name="Table_20_Heading">Threat</text:p>
            </table:table-cell>
            <table:table-cell table:style-name="Table4.A1" office:value-type="string">
              <text:p text:style-name="Table_20_Heading">Justification</text:p>
            </table:table-cell>
          </table:table-row>
        </table:table-header-rows>
        <table:table-row>
          <table:table-cell table:style-name="Table4.A1" office:value-type="string">
            <text:p text:style-name="Table_20_Contents">Remote exploitation of web services</text:p>
          </table:table-cell>
          <table:table-cell table:style-name="Table4.A1" office:value-type="string">
            <text:p text:style-name="Table_20_Contents">The product does not implement a web server.</text:p>
          </table:table-cell>
        </table:table-row>
        <table:table-row>
          <table:table-cell table:style-name="Table4.A1" office:value-type="string">
            <text:p text:style-name="Table_20_Contents">HTTP-based attacks</text:p>
          </table:table-cell>
          <table:table-cell table:style-name="Table4.A1" office:value-type="string">
            <text:p text:style-name="Table_20_Contents">HTTP is not implemented.</text:p>
          </table:table-cell>
        </table:table-row>
        <table:table-row>
          <table:table-cell table:style-name="Table4.A1" office:value-type="string">
            <text:p text:style-name="Table_20_Contents">HTTPS attacks</text:p>
          </table:table-cell>
          <table:table-cell table:style-name="Table4.A1" office:value-type="string">
            <text:p text:style-name="Table_20_Contents">HTTPS is not implemented.</text:p>
          </table:table-cell>
        </table:table-row>
        <table:table-row>
          <table:table-cell table:style-name="Table4.A1" office:value-type="string">
            <text:p text:style-name="Table_20_Contents">SQL Injection</text:p>
          </table:table-cell>
          <table:table-cell table:style-name="Table4.A1" office:value-type="string">
            <text:p text:style-name="Table_20_Contents">No database exists.</text:p>
          </table:table-cell>
        </table:table-row>
        <table:table-row>
          <table:table-cell table:style-name="Table4.A1" office:value-type="string">
            <text:p text:style-name="Table_20_Contents">Cross-Site Scripting (XSS)</text:p>
          </table:table-cell>
          <table:table-cell table:style-name="Table4.A1" office:value-type="string">
            <text:p text:style-name="Table_20_Contents">No browser interface exists.</text:p>
          </table:table-cell>
        </table:table-row>
        <table:table-row>
          <table:table-cell table:style-name="Table4.A1" office:value-type="string">
            <text:p text:style-name="Table_20_Contents">Remote SSH attacks</text:p>
          </table:table-cell>
          <table:table-cell table:style-name="Table4.A1" office:value-type="string">
            <text:p text:style-name="Table_20_Contents">SSH is not implemented.</text:p>
          </table:table-cell>
        </table:table-row>
        <table:table-row>
          <table:table-cell table:style-name="Table4.A1" office:value-type="string">
            <text:p text:style-name="Table_20_Contents">Telnet attacks</text:p>
          </table:table-cell>
          <table:table-cell table:style-name="Table4.A1" office:value-type="string">
            <text:p text:style-name="Table_20_Contents">Telnet is not implemented.</text:p>
          </table:table-cell>
        </table:table-row>
        <table:table-row>
          <table:table-cell table:style-name="Table4.A1" office:value-type="string">
            <text:p text:style-name="Table_20_Contents">Cloud account compromise</text:p>
          </table:table-cell>
          <table:table-cell table:style-name="Table4.A1" office:value-type="string">
            <text:p text:style-name="Table_20_Contents">No cloud connectivity exists.</text:p>
          </table:table-cell>
        </table:table-row>
        <table:table-row>
          <table:table-cell table:style-name="Table4.A1" office:value-type="string">
            <text:p text:style-name="Table_20_Contents">Bluetooth attacks</text:p>
          </table:table-cell>
          <table:table-cell table:style-name="Table4.A1" office:value-type="string">
            <text:p text:style-name="Table_20_Contents">Bluetooth hardware is not present.</text:p>
          </table:table-cell>
        </table:table-row>
        <table:table-row>
          <table:table-cell table:style-name="Table4.A1" office:value-type="string">
            <text:p text:style-name="Table_20_Contents">Wi-Fi attacks</text:p>
          </table:table-cell>
          <table:table-cell table:style-name="Table4.A1" office:value-type="string">
            <text:p text:style-name="Table_20_Contents">Wi-Fi hardware is not present.</text:p>
          </table:table-cell>
        </table:table-row>
        <table:table-row>
          <table:table-cell table:style-name="Table4.A1" office:value-type="string">
            <text:p text:style-name="Table_20_Contents">Internet malware</text:p>
          </table:table-cell>
          <table:table-cell table:style-name="Table4.A1" office:value-type="string">
            <text:p text:style-name="Table_20_Contents">The product does not connect to the Internet.</text:p>
          </table:table-cell>
        </table:table-row>
        <table:table-row>
          <table:table-cell table:style-name="Table4.A1" office:value-type="string">
            <text:p text:style-name="Table_20_Contents">Remote ransomware</text:p>
          </table:table-cell>
          <table:table-cell table:style-name="Table4.A1" office:value-type="string">
            <text:p text:style-name="Table_20_Contents">No remote execution path exists.</text:p>
          </table:table-cell>
        </table:table-row>
        <table:table-row>
          <table:table-cell table:style-name="Table4.A1" office:value-type="string">
            <text:p text:style-name="Table_20_Contents">Email phishing</text:p>
          </table:table-cell>
          <table:table-cell table:style-name="Table4.A1" office:value-type="string">
            <text:p text:style-name="Table_20_Contents">The product does not process email.</text:p>
          </table:table-cell>
        </table:table-row>
      </table:table>
      <text:h text:style-name="Heading_20_1" text:outline-level="1">Assessment Summary</text:h>
      <text:p text:style-name="Text_20_body"/>
      <text:p text:style-name="Text_20_body">A considerable number of cybersecurity threats commonly associated with network-connected products are not applicable to the assessed controller because the technologies required to perform such attacks are intentionally absent.</text:p>
      <text:p text:style-name="Text_20_body">This conclusion is based on the actual architecture of the product rather than on assumptions regarding attacker capabilities.</text:p>
      <text:p text:style-name="Text_20_body">Accordingly, the cybersecurity assessment focuses on the remaining realistic attack vectors: physical access, local communication interfaces and maintenance activities.</text:p>
      <text:h text:style-name="Heading_20_1" text:outline-level="1"/>
      <text:p text:style-name="P19"/>
      <text:h text:style-name="Heading_20_1" text:outline-level="1">12. Cybersecurity Risk Assessment</text:h>
      <text:h text:style-name="Heading_20_2" text:outline-level="2">12.1 Assessment Method</text:h>
      <text:p text:style-name="Text_20_body">Each identified cybersecurity topic has been evaluated considering:</text:p>
      <text:list xml:id="list3572499542326456608" text:style-name="L36">
        <text:list-item>
          <text:p text:style-name="P14">the intended operating environment; </text:p>
        </text:list-item>
        <text:list-item>
          <text:p text:style-name="P14">the available attack surface; </text:p>
        </text:list-item>
        <text:list-item>
          <text:p text:style-name="P14">the required attacker capabilities; </text:p>
        </text:list-item>
        <text:list-item>
          <text:p text:style-name="P14">the potential operational impact; </text:p>
        </text:list-item>
        <text:list-item>
          <text:p text:style-name="P4">the expected likelihood of occurrence. </text:p>
        </text:list-item>
      </text:list>
      <text:p text:style-name="Text_20_body">The objective of this assessment is not to eliminate every theoretical cybersecurity risk but to determine whether the remaining residual risk is acceptable for the intended application.</text:p>
      <text:p text:style-name="Text_20_body">Cybersecurity risks requiring technologies that are not implemented by the product are not included in this assessment.</text:p>
      <text:h text:style-name="Heading_20_2" text:outline-level="2">12.2 Risk Classification</text:h>
      <text:p text:style-name="Text_20_body">For the purpose of this document the following qualitative risk levels are used.</text:p>
      <table:table table:name="Table5" table:style-name="Table5">
        <table:table-column table:style-name="Table5.A"/>
        <table:table-column table:style-name="Table5.B"/>
        <table:table-header-rows>
          <table:table-row>
            <table:table-cell table:style-name="Table5.A1" office:value-type="string">
              <text:p text:style-name="Table_20_Heading">Residual Risk</text:p>
            </table:table-cell>
            <table:table-cell table:style-name="Table5.A1" office:value-type="string">
              <text:p text:style-name="Table_20_Heading">Interpretation</text:p>
            </table:table-cell>
          </table:table-row>
        </table:table-header-rows>
        <table:table-row>
          <table:table-cell table:style-name="Table5.A1" office:value-type="string">
            <text:p text:style-name="Table_20_Contents">Negligible</text:p>
          </table:table-cell>
          <table:table-cell table:style-name="Table5.A1" office:value-type="string">
            <text:p text:style-name="Table_20_Contents">No practical cybersecurity concern under intended operating conditions.</text:p>
          </table:table-cell>
        </table:table-row>
        <table:table-row>
          <table:table-cell table:style-name="Table5.A1" office:value-type="string">
            <text:p text:style-name="Table_20_Contents">Low</text:p>
          </table:table-cell>
          <table:table-cell table:style-name="Table5.A1" office:value-type="string">
            <text:p text:style-name="Table_20_Contents">Acceptable risk requiring no additional cybersecurity measures beyond normal engineering practice.</text:p>
          </table:table-cell>
        </table:table-row>
        <table:table-row>
          <table:table-cell table:style-name="Table5.A1" office:value-type="string">
            <text:p text:style-name="Table_20_Contents">Medium</text:p>
          </table:table-cell>
          <table:table-cell table:style-name="Table5.A1" office:value-type="string">
            <text:p text:style-name="Table_20_Contents">Additional consideration may be appropriate depending on customer requirements or application.</text:p>
          </table:table-cell>
        </table:table-row>
        <table:table-row>
          <table:table-cell table:style-name="Table5.A1" office:value-type="string">
            <text:p text:style-name="Table_20_Contents">High</text:p>
          </table:table-cell>
          <table:table-cell table:style-name="Table5.A1" office:value-type="string">
            <text:p text:style-name="Table_20_Contents">Additional cybersecurity measures should be considered before product deployment.</text:p>
          </table:table-cell>
        </table:table-row>
      </table:table>
      <text:p text:style-name="Horizontal_20_Line"/>
      <text:h text:style-name="Heading_20_1" text:outline-level="1">12.3 Assessment Table</text:h>
      <text:h text:style-name="Heading_20_3" text:outline-level="3">CRA-RA-001</text:h>
      <text:p text:style-name="Text_20_body"><text:span text:style-name="Strong_20_Emphasis">Topic</text:span></text:p>
      <text:p text:style-name="Text_20_body">Physical access to the controller.</text:p>
      <text:p text:style-name="Text_20_body"><text:span text:style-name="Strong_20_Emphasis">Observation</text:span></text:p>
      <text:p text:style-name="Text_20_body">The controller is installed inside an industrial electrical cabinet or enclosure.</text:p>
      <text:p text:style-name="Text_20_body">The enclosure is normally closed during operation and accessible only during installation or maintenance.</text:p>
      <text:p text:style-name="Text_20_body"><text:span text:style-name="Strong_20_Emphasis">Assessment</text:span></text:p>
      <text:p text:style-name="Text_20_body">Unauthorized physical access is considered unlikely during normal operation.</text:p>
      <text:p text:style-name="Text_20_body">The effectiveness of this protection depends primarily on the installation rather than on the <text:soft-page-break/>controller itself.</text:p>
      <text:p text:style-name="Text_20_body"><text:span text:style-name="Strong_20_Emphasis">Residual Risk</text:span></text:p>
      <text:p text:style-name="Text_20_body">Low</text:p>
      <text:h text:style-name="Heading_20_3" text:outline-level="3">CRA-RA-002</text:h>
      <text:p text:style-name="Text_20_body"><text:span text:style-name="Strong_20_Emphasis">Topic</text:span></text:p>
      <text:p text:style-name="Text_20_body">CAN communication.</text:p>
      <text:p text:style-name="Text_20_body"><text:span text:style-name="Strong_20_Emphasis">Observation</text:span></text:p>
      <text:p text:style-name="Text_20_body">The CAN interface is intended exclusively for communication with equipment belonging to the same industrial control system.</text:p>
      <text:p text:style-name="Text_20_body"><text:span text:style-name="Strong_20_Emphasis">Assessment</text:span></text:p>
      <text:p text:style-name="Text_20_body">Communication over CAN requires access to the industrial installation.</text:p>
      <text:p text:style-name="Text_20_body">No remote communication path exists.</text:p>
      <text:p text:style-name="Text_20_body">Potential manipulation of CAN traffic therefore requires physical access to the industrial network.</text:p>
      <text:p text:style-name="Text_20_body"><text:span text:style-name="Strong_20_Emphasis">Residual Risk</text:span></text:p>
      <text:p text:style-name="Text_20_body">Low</text:p>
      <text:h text:style-name="Heading_20_3" text:outline-level="3">CRA-RA-003</text:h>
      <text:p text:style-name="Text_20_body"><text:span text:style-name="Strong_20_Emphasis">Topic</text:span></text:p>
      <text:p text:style-name="Text_20_body">RS-232 diagnostic interface.</text:p>
      <text:p text:style-name="Text_20_body"><text:span text:style-name="Strong_20_Emphasis">Observation</text:span></text:p>
      <text:p text:style-name="Text_20_body">The RS-232 interface is intended for commissioning and maintenance activities.</text:p>
      <text:p text:style-name="Text_20_body"><text:span text:style-name="Strong_20_Emphasis">Assessment</text:span></text:p>
      <text:p text:style-name="Text_20_body">The interface is not expected to remain permanently connected during normal operation.</text:p>
      <text:p text:style-name="Text_20_body">Its use requires physical presence at the installation.</text:p>
      <text:p text:style-name="Text_20_body"><text:span text:style-name="Strong_20_Emphasis">Residual Risk</text:span></text:p>
      <text:p text:style-name="Text_20_body">Low</text:p>
      <text:h text:style-name="Heading_20_3" text:outline-level="3">CRA-RA-004</text:h>
      <text:p text:style-name="Text_20_body"><text:span text:style-name="Strong_20_Emphasis">Topic</text:span></text:p>
      <text:p text:style-name="Text_20_body">Firmware modification.</text:p>
      <text:p text:style-name="Text_20_body"><text:span text:style-name="Strong_20_Emphasis">Observation</text:span></text:p>
      <text:p text:style-name="Text_20_body">The controller firmware may be updated during maintenance activities.</text:p>
      <text:p text:style-name="Text_20_body"><text:span text:style-name="Strong_20_Emphasis">Assessment</text:span></text:p>
      <text:p text:style-name="Text_20_body">The update process requires direct access to the controller.</text:p>
      <text:p text:style-name="Text_20_body">Consequently, opportunities for unauthorized firmware modification are significantly reduced compared with products supporting remote software updates.</text:p>
      <text:p text:style-name="Text_20_body"><text:span text:style-name="Strong_20_Emphasis">Residual Risk</text:span></text:p>
      <text:p text:style-name="Text_20_body"><text:soft-page-break/>Low</text:p>
      <text:h text:style-name="Heading_20_3" text:outline-level="3">CRA-RA-005</text:h>
      <text:p text:style-name="Text_20_body"><text:span text:style-name="Strong_20_Emphasis">Topic</text:span></text:p>
      <text:p text:style-name="Text_20_body">Configuration parameters.</text:p>
      <text:p text:style-name="Text_20_body"><text:span text:style-name="Strong_20_Emphasis">Observation</text:span></text:p>
      <text:p text:style-name="Text_20_body">Configuration parameters influence controller behaviour.</text:p>
      <text:p text:style-name="Text_20_body"><text:span text:style-name="Strong_20_Emphasis">Assessment</text:span></text:p>
      <text:p text:style-name="Text_20_body">Modification of configuration parameters requires maintenance access to the controller.</text:p>
      <text:p text:style-name="Text_20_body">Within the intended operating environment, unauthorized modification is considered unlikely.</text:p>
      <text:p text:style-name="Text_20_body"><text:span text:style-name="Strong_20_Emphasis">Residual Risk</text:span></text:p>
      <text:p text:style-name="Text_20_body">Low</text:p>
      <text:h text:style-name="Heading_20_3" text:outline-level="3">CRA-RA-006</text:h>
      <text:p text:style-name="Text_20_body"><text:span text:style-name="Strong_20_Emphasis">Topic</text:span></text:p>
      <text:p text:style-name="Text_20_body">Diagnostic information.</text:p>
      <text:p text:style-name="Text_20_body"><text:span text:style-name="Strong_20_Emphasis">Observation</text:span></text:p>
      <text:p text:style-name="Text_20_body">The controller provides diagnostic information intended to support maintenance.</text:p>
      <text:p text:style-name="Text_20_body"><text:span text:style-name="Strong_20_Emphasis">Assessment</text:span></text:p>
      <text:p text:style-name="Text_20_body">The assessed product does not process personal data, financial information or commercially confidential customer information.</text:p>
      <text:p text:style-name="Text_20_body">Disclosure of diagnostic information is therefore not expected to create significant cybersecurity consequences.</text:p>
      <text:p text:style-name="Text_20_body"><text:span text:style-name="Strong_20_Emphasis">Residual Risk</text:span></text:p>
      <text:p text:style-name="Text_20_body">Negligible</text:p>
      <text:h text:style-name="Heading_20_3" text:outline-level="3">CRA-RA-007</text:h>
      <text:p text:style-name="Text_20_body"><text:span text:style-name="Strong_20_Emphasis">Topic</text:span></text:p>
      <text:p text:style-name="Text_20_body">Internet-based attacks.</text:p>
      <text:p text:style-name="Text_20_body"><text:span text:style-name="Strong_20_Emphasis">Observation</text:span></text:p>
      <text:p text:style-name="Text_20_body">The product provides no Internet connectivity.</text:p>
      <text:p text:style-name="Text_20_body"><text:span text:style-name="Strong_20_Emphasis">Assessment</text:span></text:p>
      <text:p text:style-name="Text_20_body">Cyber attacks requiring Internet connectivity cannot be performed against the assessed product.</text:p>
      <text:p text:style-name="Text_20_body">Such attack scenarios are therefore considered outside the scope of this assessment.</text:p>
      <text:p text:style-name="Text_20_body"><text:span text:style-name="Strong_20_Emphasis">Residual Risk</text:span></text:p>
      <text:p text:style-name="Text_20_body">Not Applicable</text:p>
      <text:h text:style-name="Heading_20_3" text:outline-level="3"><text:soft-page-break/>CRA-RA-008</text:h>
      <text:p text:style-name="Text_20_body"><text:span text:style-name="Strong_20_Emphasis">Topic</text:span></text:p>
      <text:p text:style-name="Text_20_body">Wireless attacks.</text:p>
      <text:p text:style-name="Text_20_body"><text:span text:style-name="Strong_20_Emphasis">Observation</text:span></text:p>
      <text:p text:style-name="Text_20_body">The product implements no wireless communication technologies.</text:p>
      <text:p text:style-name="Text_20_body"><text:span text:style-name="Strong_20_Emphasis">Assessment</text:span></text:p>
      <text:p text:style-name="Text_20_body">Threats relying on Wi-Fi, Bluetooth, NFC or cellular communication are not technically applicable.</text:p>
      <text:p text:style-name="Text_20_body"><text:span text:style-name="Strong_20_Emphasis">Residual Risk</text:span></text:p>
      <text:p text:style-name="Text_20_body">Not Applicable</text:p>
      <text:h text:style-name="Heading_20_3" text:outline-level="3">CRA-RA-009</text:h>
      <text:p text:style-name="Text_20_body"><text:span text:style-name="Strong_20_Emphasis">Topic</text:span></text:p>
      <text:p text:style-name="Text_20_body">Cloud-based attacks.</text:p>
      <text:p text:style-name="Text_20_body"><text:span text:style-name="Strong_20_Emphasis">Observation</text:span></text:p>
      <text:p text:style-name="Text_20_body">The controller neither connects to nor depends upon cloud infrastructure.</text:p>
      <text:p text:style-name="Text_20_body"><text:span text:style-name="Strong_20_Emphasis">Assessment</text:span></text:p>
      <text:p text:style-name="Text_20_body">Cloud service compromise cannot directly affect the controller.</text:p>
      <text:p text:style-name="Text_20_body"><text:span text:style-name="Strong_20_Emphasis">Residual Risk</text:span></text:p>
      <text:p text:style-name="Text_20_body">Not Applicable</text:p>
      <text:h text:style-name="Heading_20_3" text:outline-level="3">CRA-RA-010</text:h>
      <text:p text:style-name="Text_20_body"><text:span text:style-name="Strong_20_Emphasis">Topic</text:span></text:p>
      <text:p text:style-name="Text_20_body">Removable storage.</text:p>
      <text:p text:style-name="Text_20_body"><text:span text:style-name="Strong_20_Emphasis">Observation</text:span></text:p>
      <text:p text:style-name="Text_20_body">The product provides no SD card interface or USB Host functionality.</text:p>
      <text:p text:style-name="Text_20_body"><text:span text:style-name="Strong_20_Emphasis">Assessment</text:span></text:p>
      <text:p text:style-name="Text_20_body">Malware propagation through removable media is not considered a realistic attack vector.</text:p>
      <text:p text:style-name="Text_20_body"><text:span text:style-name="Strong_20_Emphasis">Residual Risk</text:span></text:p>
      <text:p text:style-name="Text_20_body">Not Applicable</text:p>
      <text:p text:style-name="Text_20_body"/>
      <text:h text:style-name="P20" text:outline-level="1">12.4 Overall Assessment</text:h>
      <text:p text:style-name="Text_20_body">The performed assessment indicates that the cybersecurity exposure of the assessed product is primarily limited to situations involving physical access during installation, commissioning or maintenance.</text:p>
      <text:p text:style-name="Text_20_body">The absence of Internet connectivity, wireless communication and cloud services eliminates many attack vectors commonly associated with connected products.</text:p>
      <text:p text:style-name="Text_20_body">The remaining cybersecurity risks are therefore largely dependent on organizational measures implemented by the operator, including physical access control and maintenance procedures.</text:p>
      <text:p text:style-name="Text_20_body">Based on the intended operating environment and the evaluated attack surface, the overall residual cybersecurity risk is considered <text:span text:style-name="Strong_20_Emphasis">Low</text:span>.</text:p>
      <text:h text:style-name="Heading_20_1" text:outline-level="1">13. Assessment Limitations</text:h>
      <text:p text:style-name="Text_20_body">This assessment is based on the product configuration described in this document.</text:p>
      <text:p text:style-name="Text_20_body">The conclusions presented herein may no longer be valid if:</text:p>
      <text:list xml:id="list1082955333831389140" text:style-name="L37">
        <text:list-item>
          <text:p text:style-name="P15">additional communication interfaces are introduced; </text:p>
        </text:list-item>
        <text:list-item>
          <text:p text:style-name="P15">Internet connectivity is added; </text:p>
        </text:list-item>
        <text:list-item>
          <text:p text:style-name="P15">wireless communication technologies are integrated; </text:p>
        </text:list-item>
        <text:list-item>
          <text:p text:style-name="P15">remote maintenance functionality is implemented; </text:p>
        </text:list-item>
        <text:list-item>
          <text:p text:style-name="P5">the intended operating environment changes significantly. </text:p>
        </text:list-item>
      </text:list>
      <text:p text:style-name="Text_20_body">Future product revisions should therefore be reviewed whenever changes affecting the cybersecurity attack surface are introduced.</text:p>
      <text:h text:style-name="Heading_20_1" text:outline-level="1"/>
      <text:p text:style-name="P19"/>
      <text:h text:style-name="Heading_20_1" text:outline-level="1">14. Assessment Summary</text:h>
      <text:h text:style-name="Heading_20_2" text:outline-level="2">14.1 General</text:h>
      <text:p text:style-name="Text_20_body"/>
      <text:p text:style-name="Text_20_body">This cybersecurity assessment has been performed for an industrial servo controller intended for permanent installation within industrial automation systems.</text:p>
      <text:p text:style-name="Text_20_body">The assessment has been based on the actual product architecture, the intended operating environment and the expected operational lifecycle of the product.</text:p>
      <text:p text:style-name="Text_20_body">The objective has been to evaluate realistic cybersecurity exposure rather than theoretical attack scenarios.</text:p>
      <text:h text:style-name="Heading_20_2" text:outline-level="2">14.2 Product Characteristics Relevant to Cybersecurity</text:h>
      <text:p text:style-name="Text_20_body">The assessment identified the following characteristics as having the greatest influence on the overall cybersecurity exposure.</text:p>
      <text:h text:style-name="Heading_20_3" text:outline-level="3">Closed System Architecture</text:h>
      <text:p text:style-name="Text_20_body">The controller performs a dedicated control function and is not intended to operate as a general-purpose computing platform.</text:p>
      <text:p text:style-name="Text_20_body">Its functionality is intentionally limited to those features required for motor control.</text:p>
      <text:p text:style-name="Text_20_body">This architectural approach reduces software complexity and minimizes unnecessary communication interfaces.</text:p>
      <text:h text:style-name="Heading_20_3" text:outline-level="3">Absence of Internet Connectivity</text:h>
      <text:p text:style-name="Text_20_body">The product does not establish communication with public communication networks.</text:p>
      <text:p text:style-name="Text_20_body">No remote access path exists under normal operating conditions.</text:p>
      <text:p text:style-name="Text_20_body">Consequently, numerous attack scenarios commonly affecting Internet-connected devices are not applicable.</text:p>
      <text:h text:style-name="Heading_20_3" text:outline-level="3">Local Maintenance Only</text:h>
      <text:p text:style-name="Text_20_body">Configuration changes, diagnostics and firmware updates are expected to occur only during commissioning or scheduled maintenance.</text:p>
      <text:p text:style-name="Text_20_body">These activities require direct physical access to the equipment.</text:p>
      <text:p text:style-name="Text_20_body">As a result, opportunities for unauthorized modification are substantially reduced.</text:p>
      <text:h text:style-name="Heading_20_3" text:outline-level="3">Controlled Industrial Environment</text:h>
      <text:p text:style-name="Text_20_body">The intended operating environment assumes controlled physical access and installation by qualified personnel.</text:p>
      <text:p text:style-name="Text_20_body">The controller is not intended to operate in publicly accessible environments.</text:p>
      <text:p text:style-name="Text_20_body">This assumption forms an important part of the cybersecurity assessment.</text:p>
      <text:h text:style-name="Heading_20_1" text:outline-level="1"><text:soft-page-break/>14.3 Cybersecurity Exposure</text:h>
      <text:p text:style-name="Text_20_body"/>
      <text:p text:style-name="Text_20_body">The assessment identified the following areas as representing the principal cybersecurity exposure.</text:p>
      <table:table table:name="Table6" table:style-name="Table6">
        <table:table-column table:style-name="Table6.A"/>
        <table:table-column table:style-name="Table6.B"/>
        <table:table-header-rows>
          <table:table-row>
            <table:table-cell table:style-name="Table6.A1" office:value-type="string">
              <text:p text:style-name="Table_20_Heading">Area</text:p>
            </table:table-cell>
            <table:table-cell table:style-name="Table6.A1" office:value-type="string">
              <text:p text:style-name="Table_20_Heading">Assessment</text:p>
            </table:table-cell>
          </table:table-row>
        </table:table-header-rows>
        <table:table-row>
          <table:table-cell table:style-name="Table6.A1" office:value-type="string">
            <text:p text:style-name="Table_20_Contents">Physical access</text:p>
          </table:table-cell>
          <table:table-cell table:style-name="Table6.A1" office:value-type="string">
            <text:p text:style-name="Table_20_Contents">Relevant</text:p>
          </table:table-cell>
        </table:table-row>
        <table:table-row>
          <table:table-cell table:style-name="Table6.A1" office:value-type="string">
            <text:p text:style-name="Table_20_Contents">Local communication interfaces</text:p>
          </table:table-cell>
          <table:table-cell table:style-name="Table6.A1" office:value-type="string">
            <text:p text:style-name="Table_20_Contents">Relevant</text:p>
          </table:table-cell>
        </table:table-row>
        <table:table-row>
          <table:table-cell table:style-name="Table6.A1" office:value-type="string">
            <text:p text:style-name="Table_20_Contents">Firmware maintenance</text:p>
          </table:table-cell>
          <table:table-cell table:style-name="Table6.A1" office:value-type="string">
            <text:p text:style-name="Table_20_Contents">Relevant</text:p>
          </table:table-cell>
        </table:table-row>
        <table:table-row>
          <table:table-cell table:style-name="Table6.A1" office:value-type="string">
            <text:p text:style-name="Table_20_Contents">Internet connectivity</text:p>
          </table:table-cell>
          <table:table-cell table:style-name="Table6.A1" office:value-type="string">
            <text:p text:style-name="Table_20_Contents">Not applicable</text:p>
          </table:table-cell>
        </table:table-row>
        <table:table-row>
          <table:table-cell table:style-name="Table6.A1" office:value-type="string">
            <text:p text:style-name="Table_20_Contents">Wireless communication</text:p>
          </table:table-cell>
          <table:table-cell table:style-name="Table6.A1" office:value-type="string">
            <text:p text:style-name="Table_20_Contents">Not applicable</text:p>
          </table:table-cell>
        </table:table-row>
        <table:table-row>
          <table:table-cell table:style-name="Table6.A1" office:value-type="string">
            <text:p text:style-name="Table_20_Contents">Cloud services</text:p>
          </table:table-cell>
          <table:table-cell table:style-name="Table6.A1" office:value-type="string">
            <text:p text:style-name="Table_20_Contents">Not applicable</text:p>
          </table:table-cell>
        </table:table-row>
        <table:table-row>
          <table:table-cell table:style-name="Table6.A1" office:value-type="string">
            <text:p text:style-name="Table_20_Contents">Public network services</text:p>
          </table:table-cell>
          <table:table-cell table:style-name="Table6.A1" office:value-type="string">
            <text:p text:style-name="Table_20_Contents">Not applicable</text:p>
          </table:table-cell>
        </table:table-row>
      </table:table>
      <text:p text:style-name="Text_20_body">The assessment therefore concludes that the remaining cybersecurity exposure is concentrated primarily around local maintenance activities rather than continuous network communication.</text:p>
      <text:h text:style-name="Heading_20_1" text:outline-level="1">14.4 Residual Cybersecurity Risk</text:h>
      <text:p text:style-name="Text_20_body"/>
      <text:p text:style-name="Text_20_body">Following evaluation of the identified cybersecurity topics, the remaining residual risk is considered acceptable for the intended operating environment.</text:p>
      <text:p text:style-name="Text_20_body">This conclusion is based on the following observations:</text:p>
      <text:list xml:id="list6503024129145372815" text:style-name="L38">
        <text:list-item>
          <text:p text:style-name="P16">the controller is not Internet connected; </text:p>
        </text:list-item>
        <text:list-item>
          <text:p text:style-name="P16">no wireless communication technologies are implemented; </text:p>
        </text:list-item>
        <text:list-item>
          <text:p text:style-name="P16">external communication is limited to local industrial interfaces; </text:p>
        </text:list-item>
        <text:list-item>
          <text:p text:style-name="P16">maintenance activities require physical access; </text:p>
        </text:list-item>
        <text:list-item>
          <text:p text:style-name="P6">the intended operating environment provides controlled access to the equipment. </text:p>
        </text:list-item>
      </text:list>
      <text:p text:style-name="Text_20_body">The assessment therefore concludes that the product presents a comparatively limited cyber attack surface.</text:p>
      <text:p text:style-name="Text_20_body"/>
      <text:h text:style-name="P20" text:outline-level="1">14.5 Applicability of Common Cyber Threats</text:h>
      <text:p text:style-name="Text_20_body"/>
      <text:p text:style-name="Text_20_body">During the assessment, numerous commonly referenced cybersecurity threats were reviewed.</text:p>
      <text:p text:style-name="Text_20_body">Many of these threats were determined to be outside the scope of the assessed product because the technologies necessary to perform such attacks are not implemented.</text:p>
      <text:p text:style-name="Text_20_body"/>
      <text:p text:style-name="Text_20_body">Examples include:</text:p>
      <table:table table:name="Table7" table:style-name="Table7">
        <table:table-column table:style-name="Table7.A"/>
        <table:table-column table:style-name="Table7.B"/>
        <table:table-header-rows>
          <table:table-row>
            <table:table-cell table:style-name="Table7.A1" office:value-type="string">
              <text:p text:style-name="Table_20_Heading">Threat</text:p>
            </table:table-cell>
            <table:table-cell table:style-name="Table7.A1" office:value-type="string">
              <text:p text:style-name="Table_20_Heading">Assessment</text:p>
            </table:table-cell>
          </table:table-row>
        </table:table-header-rows>
        <table:table-row>
          <table:table-cell table:style-name="Table7.A1" office:value-type="string">
            <text:p text:style-name="Table_20_Contents">Remote exploitation of web applications</text:p>
          </table:table-cell>
          <table:table-cell table:style-name="Table7.A1" office:value-type="string">
            <text:p text:style-name="Table_20_Contents">Not Applicable</text:p>
          </table:table-cell>
        </table:table-row>
        <table:table-row>
          <table:table-cell table:style-name="Table7.A1" office:value-type="string">
            <text:p text:style-name="Table_20_Contents">Internet malware propagation</text:p>
          </table:table-cell>
          <table:table-cell table:style-name="Table7.A1" office:value-type="string">
            <text:p text:style-name="Table_20_Contents">Not Applicable</text:p>
          </table:table-cell>
        </table:table-row>
        <table:table-row>
          <table:table-cell table:style-name="Table7.A1" office:value-type="string">
            <text:p text:style-name="Table_20_Contents">Cloud service compromise</text:p>
          </table:table-cell>
          <table:table-cell table:style-name="Table7.A1" office:value-type="string">
            <text:p text:style-name="Table_20_Contents">Not Applicable</text:p>
          </table:table-cell>
        </table:table-row>
        <table:table-row>
          <table:table-cell table:style-name="Table7.A1" office:value-type="string">
            <text:p text:style-name="Table_20_Contents">Wireless attacks</text:p>
          </table:table-cell>
          <table:table-cell table:style-name="Table7.A1" office:value-type="string">
            <text:p text:style-name="Table_20_Contents">Not Applicable</text:p>
          </table:table-cell>
        </table:table-row>
        <table:table-row>
          <table:table-cell table:style-name="Table7.A1" office:value-type="string">
            <text:p text:style-name="Table_20_Contents">Browser exploitation</text:p>
          </table:table-cell>
          <table:table-cell table:style-name="Table7.A1" office:value-type="string">
            <text:p text:style-name="Table_20_Contents">Not Applicable</text:p>
          </table:table-cell>
        </table:table-row>
        <table:table-row>
          <table:table-cell table:style-name="Table7.A1" office:value-type="string">
            <text:p text:style-name="Table_20_Contents">Email-based attacks</text:p>
          </table:table-cell>
          <table:table-cell table:style-name="Table7.A1" office:value-type="string">
            <text:p text:style-name="Table_20_Contents">Not Applicable</text:p>
          </table:table-cell>
        </table:table-row>
        <table:table-row>
          <table:table-cell table:style-name="Table7.A1" office:value-type="string">
            <text:p text:style-name="Table_20_Contents">DNS attacks</text:p>
          </table:table-cell>
          <table:table-cell table:style-name="Table7.A1" office:value-type="string">
            <text:p text:style-name="Table_20_Contents">Not Applicable</text:p>
          </table:table-cell>
        </table:table-row>
        <table:table-row>
          <table:table-cell table:style-name="Table7.A1" office:value-type="string">
            <text:p text:style-name="Table_20_Contents">Remote shell attacks</text:p>
          </table:table-cell>
          <table:table-cell table:style-name="Table7.A1" office:value-type="string">
            <text:p text:style-name="Table_20_Contents">Not Applicable</text:p>
          </table:table-cell>
        </table:table-row>
      </table:table>
      <text:p text:style-name="Text_20_body"/>
      <text:p text:style-name="Text_20_body">These threats have not been omitted from the assessment. They have been considered and subsequently determined to be technically inapplicable to the assessed product.</text:p>
      <text:p text:style-name="Text_20_body"/>
      <text:p text:style-name="Text_20_body"/>
      <text:p text:style-name="P19"/>
      <text:h text:style-name="Heading_20_1" text:outline-level="1">15. Conclusions</text:h>
      <text:p text:style-name="Text_20_body"/>
      <text:p text:style-name="Text_20_body">The cybersecurity assessment indicates that the Industrial Servo Controller presents a limited cyber attack surface consistent with its intended use as an industrial embedded control device.</text:p>
      <text:p text:style-name="Text_20_body">Unlike products designed for permanent connectivity with external communication networks, the assessed controller operates as part of a closed industrial automation system.</text:p>
      <text:p text:style-name="Text_20_body">Its cybersecurity exposure is therefore primarily associated with local maintenance activities and controlled physical access rather than continuous network communication.</text:p>
      <text:p text:style-name="Text_20_body">The assessment did not identify any cybersecurity topic requiring extraordinary measures beyond those normally expected for industrial embedded products operating within controlled environments.</text:p>
      <text:p text:style-name="Text_20_body">Consequently, the overall cybersecurity exposure is considered proportionate to the intended application.</text:p>
      <text:p text:style-name="Text_20_body"/>
      <text:h text:style-name="P20" text:outline-level="1">16. Document Review</text:h>
      <text:p text:style-name="Text_20_body"/>
      <text:p text:style-name="Text_20_body">This assessment should be reviewed whenever one or more of the following conditions occur:</text:p>
      <text:list xml:id="list1093667011981650506" text:style-name="L39">
        <text:list-item>
          <text:p text:style-name="P17">introduction of new communication interfaces; </text:p>
        </text:list-item>
        <text:list-item>
          <text:p text:style-name="P17">addition of Internet connectivity; </text:p>
        </text:list-item>
        <text:list-item>
          <text:p text:style-name="P17">integration of wireless communication technologies; </text:p>
        </text:list-item>
        <text:list-item>
          <text:p text:style-name="P17">significant firmware architecture changes; </text:p>
        </text:list-item>
        <text:list-item>
          <text:p text:style-name="P17">changes to the intended operating environment; </text:p>
        </text:list-item>
        <text:list-item>
          <text:p text:style-name="P7">discovery of previously unknown cybersecurity vulnerabilities affecting the product architecture. </text:p>
        </text:list-item>
      </text:list>
      <text:p text:style-name="Text_20_body">Periodic review is recommended throughout the supported product lifetime.</text:p>
      <text:h text:style-name="Heading_20_1" text:outline-level="1">Appendix A – Product Configuration Covered by this Assessment</text:h>
      <text:p text:style-name="Text_20_body">This assessment applies only to products having the following characteristics:</text:p>
      <text:list xml:id="list8099127400501186884" text:style-name="L40">
        <text:list-item>
          <text:p text:style-name="P18">Industrial servo controller </text:p>
        </text:list-item>
        <text:list-item>
          <text:p text:style-name="P18">Embedded real-time firmware </text:p>
        </text:list-item>
        <text:list-item>
          <text:p text:style-name="P18">CAN-FD communication </text:p>
        </text:list-item>
        <text:list-item>
          <text:p text:style-name="P18">Local RS-232 service interface </text:p>
        </text:list-item>
        <text:list-item>
          <text:p text:style-name="P18">No Ethernet </text:p>
        </text:list-item>
        <text:list-item>
          <text:p text:style-name="P18">No Wi-Fi </text:p>
        </text:list-item>
        <text:list-item>
          <text:p text:style-name="P18">No Bluetooth </text:p>
        </text:list-item>
        <text:list-item>
          <text:p text:style-name="P18">No cellular communication </text:p>
        </text:list-item>
        <text:list-item>
          <text:p text:style-name="P18">No cloud connectivity </text:p>
        </text:list-item>
        <text:list-item>
          <text:p text:style-name="P8">Intended for installation inside industrial equipment </text:p>
        </text:list-item>
      </text:list>
      <text:p text:style-name="Text_20_body">Products incorporating additional communication technologies should be assessed separately.</text:p>
      <text:h text:style-name="Heading_20_1" text:outline-level="1">Appendix B – Disclaimer</text:h>
      <text:p text:style-name="Text_20_body"/>
      <text:p text:style-name="Text_20_body">This document has been prepared as an engineering cybersecurity assessment for an example industrial embedded product.</text:p>
      <text:p text:style-name="Text_20_body">It is intended to illustrate a practical methodology for documenting cybersecurity considerations in accordance with the principles of the European Cyber Resilience Act.</text:p>
      <text:p text:style-name="Text_20_body">The document does not constitute legal advice, certification evidence or a formal declaration of conformity.</text:p>
      <text:p text:style-name="Text_20_body">Individual manufacturers remain responsible for determining the applicability of regulatory requirements to their specific produc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1" style:family="paragraph">
      <style:text-properties fo:font-size="18pt" fo:font-weight="bold"/>
    </style:style>
    <style:style style:name="H2" style:family="paragraph">
      <style:text-properties fo:font-size="14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6$Win32 OpenOffice.org_project/4116m3$Build-9816</meta:generator>
    <dc:date>2026-07-06T10:52:30.38</dc:date>
    <dc:creator>Boris Radonic</dc:creator>
    <meta:editing-duration>PT42M37S</meta:editing-duration>
    <meta:editing-cycles>5</meta:editing-cycles>
    <meta:document-statistic meta:table-count="7" meta:image-count="0" meta:object-count="0" meta:page-count="18" meta:paragraph-count="462" meta:word-count="3017" meta:character-count="22844"/>
  </office:meta>
</office:document-meta>
</file>
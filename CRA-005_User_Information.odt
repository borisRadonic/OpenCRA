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684cm" table:align="left"/>
    </style:style>
    <style:style style:name="Table1.A" style:family="table-column">
      <style:table-column-properties style:column-width="2.24cm"/>
    </style:style>
    <style:style style:name="Table1.B" style:family="table-column">
      <style:table-column-properties style:column-width="7.44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5.168cm" table:align="left"/>
    </style:style>
    <style:style style:name="Table2.A" style:family="table-column">
      <style:table-column-properties style:column-width="1.572cm"/>
    </style:style>
    <style:style style:name="Table2.B" style:family="table-column">
      <style:table-column-properties style:column-width="1.252cm"/>
    </style:style>
    <style:style style:name="Table2.C" style:family="table-column">
      <style:table-column-properties style:column-width="2.344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A-005</text:h>
      <text:h text:style-name="Heading_20_1" text:outline-level="1">User Cybersecurity Information</text:h>
      <text:p text:style-name="Text_20_body"><text:span text:style-name="Strong_20_Emphasis">Document ID:</text:span> CRA-005</text:p>
      <text:p text:style-name="Text_20_body"><text:span text:style-name="Strong_20_Emphasis">Document Title:</text:span> User Cybersecurity Information</text:p>
      <text:p text:style-name="Text_20_body"><text:span text:style-name="Strong_20_Emphasis">Version:</text:span> 1.0 Draft</text:p>
      <text:p text:style-name="Text_20_body"><text:span text:style-name="Strong_20_Emphasis">Date:</text:span> [Date]</text:p>
      <text:h text:style-name="Heading_20_1" text:outline-level="1">1. Purpose</text:h>
      <text:p text:style-name="Text_20_body"/>
      <text:p text:style-name="Text_20_body">This document provides cybersecurity-related information for users of the Industrial Servo Controller.</text:p>
      <text:p text:style-name="Text_20_body">It supplements the User Manual by describing the intended operating environment, cybersecurity assumptions and user responsibilities that contribute to the secure operation of the product.</text:p>
      <text:h text:style-name="Heading_20_1" text:outline-level="1">2. Intended Use</text:h>
      <text:p text:style-name="Text_20_body"/>
      <text:p text:style-name="Text_20_body">The Industrial Servo Controller is designed for industrial automation and robotic applications.</text:p>
      <text:p text:style-name="Text_20_body">The product is intended for permanent installation inside an industrial electrical cabinet or machine enclosure.</text:p>
      <text:p text:style-name="Text_20_body">The controller is not intended for consumer use or direct connection to public communication networks.</text:p>
      <text:h text:style-name="Heading_20_1" text:outline-level="1">3. Intended Operating Environment</text:h>
      <text:p text:style-name="Text_20_body"/>
      <text:p text:style-name="Text_20_body">The cybersecurity assessment of this product assumes the following operating conditions:</text:p>
      <text:list xml:id="list7224147277855307884" text:style-name="L1">
        <text:list-item>
          <text:p text:style-name="P1">Installation inside a closed industrial electrical cabinet.</text:p>
        </text:list-item>
        <text:list-item>
          <text:p text:style-name="P1">Access restricted to authorized personnel.</text:p>
        </text:list-item>
        <text:list-item>
          <text:p text:style-name="P1">Operation as part of a trusted industrial automation system.</text:p>
        </text:list-item>
        <text:list-item>
          <text:p text:style-name="P1">Maintenance performed by qualified personnel.</text:p>
        </text:list-item>
        <text:list-item>
          <text:p text:style-name="P1">No direct Internet connectivity.</text:p>
        </text:list-item>
      </text:list>
      <text:p text:style-name="Text_20_body">Operation outside these conditions may increase cybersecurity exposure and should be evaluated by the system integrator.</text:p>
      <text:h text:style-name="Heading_20_1" text:outline-level="1"><text:soft-page-break/>4. Communication Interfaces</text:h>
      <text:p text:style-name="Text_20_body"/>
      <text:p text:style-name="Text_20_body">The product provides only the communication interfaces required for its intended industrial application.</text:p>
      <text:p text:style-name="Text_20_body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Interface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CAN-FD</text:p>
          </table:table-cell>
          <table:table-cell table:style-name="Table1.A1" office:value-type="string">
            <text:p text:style-name="Table_20_Contents">Communication with the motion controller</text:p>
          </table:table-cell>
        </table:table-row>
        <table:table-row>
          <table:table-cell table:style-name="Table1.A1" office:value-type="string">
            <text:p text:style-name="Table_20_Contents">RS-232</text:p>
          </table:table-cell>
          <table:table-cell table:style-name="Table1.A1" office:value-type="string">
            <text:p text:style-name="Table_20_Contents">Local commissioning and diagnostics</text:p>
          </table:table-cell>
        </table:table-row>
        <table:table-row>
          <table:table-cell table:style-name="Table1.A1" office:value-type="string">
            <text:p text:style-name="Table_20_Contents">SWD/JTAG</text:p>
          </table:table-cell>
          <table:table-cell table:style-name="Table1.A1" office:value-type="string">
            <text:p text:style-name="Table_20_Contents">Manufacturing and service</text:p>
          </table:table-cell>
        </table:table-row>
      </table:table>
      <text:p text:style-name="Text_20_body"/>
      <text:p text:style-name="Text_20_body">The product does not implement:</text:p>
      <text:list xml:id="list3504208941475253642" text:style-name="L2">
        <text:list-item>
          <text:p text:style-name="P2">Ethernet</text:p>
        </text:list-item>
        <text:list-item>
          <text:p text:style-name="P2">Wi-Fi</text:p>
        </text:list-item>
        <text:list-item>
          <text:p text:style-name="P2">Bluetooth</text:p>
        </text:list-item>
        <text:list-item>
          <text:p text:style-name="P2">Cellular communication</text:p>
        </text:list-item>
        <text:list-item>
          <text:p text:style-name="P2">Cloud connectivity</text:p>
        </text:list-item>
      </text:list>
      <text:h text:style-name="Heading_20_1" text:outline-level="1">5. Installation Recommendations</text:h>
      <text:p text:style-name="Text_20_body"/>
      <text:p text:style-name="Text_20_body">To reduce cybersecurity risks, the manufacturer recommends:</text:p>
      <text:list xml:id="list567507495472461938" text:style-name="L3">
        <text:list-item>
          <text:p text:style-name="P3">Install the controller inside a locked electrical cabinet.</text:p>
        </text:list-item>
        <text:list-item>
          <text:p text:style-name="P3">Restrict physical access to authorized personnel.</text:p>
        </text:list-item>
        <text:list-item>
          <text:p text:style-name="P3">Disconnect service equipment after maintenance.</text:p>
        </text:list-item>
        <text:list-item>
          <text:p text:style-name="P3">Connect the controller only to trusted industrial equipment.</text:p>
        </text:list-item>
        <text:list-item>
          <text:p text:style-name="P3">Follow the installation instructions provided in the User Manual.</text:p>
        </text:list-item>
      </text:list>
      <text:p text:style-name="Text_20_body">These recommendations are consistent with the intended operating environment used during the cybersecurity assessment.</text:p>
      <text:h text:style-name="Heading_20_1" text:outline-level="1">6. Firmware Updates</text:h>
      <text:p text:style-name="Text_20_body"/>
      <text:p text:style-name="Text_20_body">Firmware updates may be released during the supported lifetime of the product.</text:p>
      <text:p text:style-name="Text_20_body">Users are encouraged to:</text:p>
      <text:list xml:id="list6984045914954269357" text:style-name="L4">
        <text:list-item>
          <text:p text:style-name="P4">install firmware updates supplied by the manufacturer;</text:p>
        </text:list-item>
        <text:list-item>
          <text:p text:style-name="P4">follow the official update instructions;</text:p>
        </text:list-item>
        <text:list-item>
          <text:p text:style-name="P4">verify that the firmware corresponds to the intended product model.</text:p>
        </text:list-item>
      </text:list>
      <text:p text:style-name="Text_20_body">Information regarding available firmware updates is published on the manufacturer's website.</text:p>
      <text:h text:style-name="Heading_20_1" text:outline-level="1"><text:soft-page-break/>7. Reporting Security Issues</text:h>
      <text:p text:style-name="Text_20_body"/>
      <text:p text:style-name="Text_20_body">Suspected cybersecurity vulnerabilities should be reported using the manufacturer's published Vulnerability Disclosure Policy.</text:p>
      <text:p text:style-name="Text_20_body">Security contact:</text:p>
      <text:p text:style-name="Text_20_body">Email:</text:p>
      <text:p text:style-name="Text_20_body">security@[company].com</text:p>
      <text:p text:style-name="Text_20_body">Website:</text:p>
      <text:p text:style-name="Text_20_body"><text:a xlink:type="simple" xlink:href="https://www.example.com/security" text:style-name="Internet_20_link" text:visited-style-name="Visited_20_Internet_20_Link">https://www.example.com/security</text:a></text:p>
      <text:h text:style-name="Heading_20_1" text:outline-level="1">8. Product Support</text:h>
      <text:p text:style-name="Text_20_body"/>
      <text:p text:style-name="Text_20_body">Cybersecurity updates are provided only for products within their supported lifecycle.</text:p>
      <text:p text:style-name="Text_20_body">The current support status of the product is available on the manufacturer's website.</text:p>
      <text:p text:style-name="Text_20_body">Users operating products beyond their supported lifetime should perform an application-specific risk assessment before continued operation.</text:p>
      <text:h text:style-name="Heading_20_1" text:outline-level="1">9. User Responsibilities</text:h>
      <text:p text:style-name="Text_20_body"/>
      <text:p text:style-name="Text_20_body">The overall cybersecurity of an industrial automation system depends not only on the product itself but also on the environment in which it is installed.</text:p>
      <text:p text:style-name="Text_20_body">Users and system integrators are responsible for:</text:p>
      <text:list xml:id="list3507069899845521532" text:style-name="L5">
        <text:list-item>
          <text:p text:style-name="P5">protecting physical access to the installation;</text:p>
        </text:list-item>
        <text:list-item>
          <text:p text:style-name="P5">maintaining the industrial control system;</text:p>
        </text:list-item>
        <text:list-item>
          <text:p text:style-name="P5">applying available firmware updates where appropriate;</text:p>
        </text:list-item>
        <text:list-item>
          <text:p text:style-name="P5">ensuring that only authorized personnel perform maintenance;</text:p>
        </text:list-item>
        <text:list-item>
          <text:p text:style-name="P5">following the manufacturer's installation and operating instructions.</text:p>
        </text:list-item>
      </text:list>
      <text:h text:style-name="Heading_20_1" text:outline-level="1">10. Limitations</text:h>
      <text:p text:style-name="Text_20_body"/>
      <text:p text:style-name="Text_20_body">The cybersecurity assessment for this product assumes that the controller is used as intended.</text:p>
      <text:p text:style-name="Text_20_body">The manufacturer cannot assess cybersecurity risks arising from:</text:p>
      <text:list xml:id="list7208050369606752394" text:style-name="L6">
        <text:list-item>
          <text:p text:style-name="P6">unauthorized product modifications;</text:p>
        </text:list-item>
        <text:list-item>
          <text:p text:style-name="P6">operation outside the intended environment;</text:p>
        </text:list-item>
        <text:list-item>
          <text:p text:style-name="P6">integration into unknown third-party systems;</text:p>
        </text:list-item>
        <text:list-item>
          <text:p text:style-name="P6"><text:soft-page-break/>installation contrary to the User Manual.</text:p>
        </text:list-item>
      </text:list>
      <text:p text:style-name="Text_20_body">Such situations should be evaluated by the system integrator.</text:p>
      <text:h text:style-name="Heading_20_1" text:outline-level="1">11. Additional Information</text:h>
      <text:p text:style-name="Text_20_body"/>
      <text:p text:style-name="Text_20_body">Additional cybersecurity information is available in:</text:p>
      <text:list xml:id="list784780359905233300" text:style-name="L7">
        <text:list-item>
          <text:p text:style-name="P7">CRA-001 – Cybersecurity Risk Assessment</text:p>
        </text:list-item>
        <text:list-item>
          <text:p text:style-name="P7">CRA-003 – Vulnerability Disclosure Policy</text:p>
        </text:list-item>
        <text:list-item>
          <text:p text:style-name="P7">User Manual</text:p>
        </text:list-item>
        <text:list-item>
          <text:p text:style-name="P7">Installation Manual</text:p>
        </text:list-item>
        <text:list-item>
          <text:p text:style-name="P7">Product Release Notes</text:p>
        </text:list-item>
      </text:list>
      <text:p text:style-name="Text_20_body">The latest versions of these documents are available from the manufacturer's website.</text:p>
      <text:h text:style-name="Heading_20_1" text:outline-level="1">Document History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Version</text:p>
            </table:table-cell>
            <table:table-cell table:style-name="Table2.A1" office:value-type="string">
              <text:p text:style-name="Table_20_Heading">Dat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1.0</text:p>
          </table:table-cell>
          <table:table-cell table:style-name="Table2.A1" office:value-type="string">
            <text:p text:style-name="Table_20_Contents">[Date]</text:p>
          </table:table-cell>
          <table:table-cell table:style-name="Table2.A1" office:value-type="string">
            <text:p text:style-name="Table_20_Contents">Initial Draf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ris Radonic</meta:initial-creator>
    <meta:creation-date>2026-07-06T11:17:47.08</meta:creation-date>
    <dc:date>2026-07-06T11:20:21.92</dc:date>
    <dc:creator>Boris Radonic</dc:creator>
    <meta:editing-duration>PT2M34S</meta:editing-duration>
    <meta:editing-cycles>2</meta:editing-cycles>
    <meta:generator>OpenOffice/4.1.16$Win32 OpenOffice.org_project/4116m3$Build-9816</meta:generator>
    <meta:document-statistic meta:table-count="2" meta:image-count="0" meta:object-count="0" meta:page-count="4" meta:paragraph-count="94" meta:word-count="582" meta:character-count="4307"/>
  </office:meta>
</office:document-meta>
</file>
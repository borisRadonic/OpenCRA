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.168cm" table:align="left"/>
    </style:style>
    <style:style style:name="Table1.A" style:family="table-column">
      <style:table-column-properties style:column-width="1.572cm"/>
    </style:style>
    <style:style style:name="Table1.B" style:family="table-column">
      <style:table-column-properties style:column-width="1.252cm"/>
    </style:style>
    <style:style style:name="Table1.C" style:family="table-column">
      <style:table-column-properties style:column-width="2.344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RA-003</text:h>
      <text:h text:style-name="Heading_20_1" text:outline-level="1">Vulnerability Disclosure Policy</text:h>
      <text:p text:style-name="Text_20_body"><text:span text:style-name="Strong_20_Emphasis">Document ID:</text:span> CRA-003</text:p>
      <text:p text:style-name="Text_20_body"><text:span text:style-name="Strong_20_Emphasis">Document Title:</text:span> Vulnerability Disclosure Policy</text:p>
      <text:p text:style-name="Text_20_body"><text:span text:style-name="Strong_20_Emphasis">Version:</text:span> 1.0 Draft</text:p>
      <text:p text:style-name="Text_20_body"><text:span text:style-name="Strong_20_Emphasis">Date:</text:span> [Date]</text:p>
      <text:h text:style-name="Heading_20_1" text:outline-level="1">1. Purpose</text:h>
      <text:p text:style-name="Text_20_body"/>
      <text:p text:style-name="Text_20_body">This Vulnerability Disclosure Policy describes how security researchers, customers and other interested parties can responsibly report potential cybersecurity vulnerabilities affecting products manufactured by <text:span text:style-name="Strong_20_Emphasis">[Company Name]</text:span>.</text:p>
      <text:p text:style-name="Text_20_body">The objective of this policy is to encourage responsible disclosure and to ensure that reported vulnerabilities are evaluated and handled in a timely and transparent manner.</text:p>
      <text:h text:style-name="Heading_20_1" text:outline-level="1">2. Scope</text:h>
      <text:p text:style-name="Text_20_body"/>
      <text:p text:style-name="Text_20_body">This policy applies to all products developed and maintained by <text:span text:style-name="Strong_20_Emphasis">[Company Name]</text:span> that contain digital elements and are supported by the company.</text:p>
      <text:p text:style-name="Text_20_body">The policy covers reports concerning:</text:p>
      <text:list xml:id="list4778864367449172948" text:style-name="L1">
        <text:list-item>
          <text:p text:style-name="P1">Embedded firmware</text:p>
        </text:list-item>
        <text:list-item>
          <text:p text:style-name="P1">Bootloaders</text:p>
        </text:list-item>
        <text:list-item>
          <text:p text:style-name="P1">Communication interfaces</text:p>
        </text:list-item>
        <text:list-item>
          <text:p text:style-name="P1">Configuration software</text:p>
        </text:list-item>
        <text:list-item>
          <text:p text:style-name="P1">PC service tools</text:p>
        </text:list-item>
        <text:list-item>
          <text:p text:style-name="P1">Product documentation where cybersecurity implications exist</text:p>
        </text:list-item>
      </text:list>
      <text:p text:style-name="Text_20_body">The policy does not apply to:</text:p>
      <text:list xml:id="list3167213245104785976" text:style-name="L2">
        <text:list-item>
          <text:p text:style-name="P2">Third-party products</text:p>
        </text:list-item>
        <text:list-item>
          <text:p text:style-name="P2">Customer-specific system integration</text:p>
        </text:list-item>
        <text:list-item>
          <text:p text:style-name="P2">Vulnerabilities already publicly disclosed</text:p>
        </text:list-item>
        <text:list-item>
          <text:p text:style-name="P2">Issues unrelated to cybersecurity</text:p>
        </text:list-item>
      </text:list>
      <text:p text:style-name="Horizontal_20_Line"/>
      <text:h text:style-name="Heading_20_1" text:outline-level="1"><text:soft-page-break/>3. Reporting a Vulnerability</text:h>
      <text:p text:style-name="Text_20_body"/>
      <text:p text:style-name="Text_20_body">Security vulnerabilities should be reported by email.</text:p>
      <text:p text:style-name="Text_20_body"><text:span text:style-name="Strong_20_Emphasis">Email:</text:span></text:p>
      <text:p text:style-name="Text_20_body">security@[company].com</text:p>
      <text:p text:style-name="Text_20_body">The report should include, where available:</text:p>
      <text:list xml:id="list1452549456661039943" text:style-name="L3">
        <text:list-item>
          <text:p text:style-name="P3">Product name</text:p>
        </text:list-item>
        <text:list-item>
          <text:p text:style-name="P3">Product version</text:p>
        </text:list-item>
        <text:list-item>
          <text:p text:style-name="P3">Firmware version</text:p>
        </text:list-item>
        <text:list-item>
          <text:p text:style-name="P3">Description of the issue</text:p>
        </text:list-item>
        <text:list-item>
          <text:p text:style-name="P3">Steps required to reproduce the issue</text:p>
        </text:list-item>
        <text:list-item>
          <text:p text:style-name="P3">Potential impact</text:p>
        </text:list-item>
        <text:list-item>
          <text:p text:style-name="P3">Supporting documentation, screenshots or log files</text:p>
        </text:list-item>
      </text:list>
      <text:p text:style-name="Text_20_body">Providing clear technical information helps us investigate the reported issue efficiently.</text:p>
      <text:h text:style-name="Heading_20_1" text:outline-level="1">4. Report Handling Process</text:h>
      <text:p text:style-name="Text_20_body"/>
      <text:p text:style-name="Text_20_body">Upon receiving a vulnerability report, the manufacturer will:</text:p>
      <text:list xml:id="list1707904494504572293" text:style-name="L4">
        <text:list-item>
          <text:p text:style-name="P4">Acknowledge receipt of the report.</text:p>
        </text:list-item>
        <text:list-item>
          <text:p text:style-name="P4">Review the reported information.</text:p>
        </text:list-item>
        <text:list-item>
          <text:p text:style-name="P4">Determine whether the issue can be reproduced.</text:p>
        </text:list-item>
        <text:list-item>
          <text:p text:style-name="P4">Assess the potential cybersecurity impact.</text:p>
        </text:list-item>
        <text:list-item>
          <text:p text:style-name="P4">Determine appropriate corrective actions, where necessary.</text:p>
        </text:list-item>
        <text:list-item>
          <text:p text:style-name="P4">Inform the reporter when the investigation has been completed, where appropriate.</text:p>
        </text:list-item>
      </text:list>
      <text:p text:style-name="Text_20_body">Not every reported issue will necessarily be classified as a cybersecurity vulnerability.</text:p>
      <text:p text:style-name="Text_20_body"/>
      <text:h text:style-name="Heading_20_1" text:outline-level="1">5. Coordinated Disclosure</text:h>
      <text:p text:style-name="Text_20_body"/>
      <text:p text:style-name="Text_20_body">The manufacturer supports responsible and coordinated disclosure.</text:p>
      <text:p text:style-name="Text_20_body">Reporters are encouraged to allow sufficient time for investigation and, where necessary, development of corrective measures before public disclosure.</text:p>
      <text:p text:style-name="Text_20_body">This approach helps reduce potential risks for existing users of the affected products.</text:p>
      <text:h text:style-name="Heading_20_1" text:outline-level="1"><text:soft-page-break/>6. Product Support</text:h>
      <text:p text:style-name="Text_20_body">Where a confirmed cybersecurity vulnerability affects a supported product, the manufacturer will evaluate appropriate corrective actions.</text:p>
      <text:p text:style-name="Text_20_body">Depending on the nature of the issue, these may include:</text:p>
      <text:list xml:id="list2305000758882060925" text:style-name="L5">
        <text:list-item>
          <text:p text:style-name="P5">Firmware update</text:p>
        </text:list-item>
        <text:list-item>
          <text:p text:style-name="P5">Configuration guidance</text:p>
        </text:list-item>
        <text:list-item>
          <text:p text:style-name="P5">User documentation update</text:p>
        </text:list-item>
        <text:list-item>
          <text:p text:style-name="P5">Operational recommendations</text:p>
        </text:list-item>
        <text:list-item>
          <text:p text:style-name="P5">Other appropriate mitigation measures</text:p>
        </text:list-item>
      </text:list>
      <text:p text:style-name="Text_20_body">Corrective actions will depend on the severity of the issue, product lifecycle status and technical feasibility.</text:p>
      <text:h text:style-name="Heading_20_1" text:outline-level="1">7. Products No Longer Supported</text:h>
      <text:p text:style-name="Text_20_body">Products that have reached the end of their supported lifecycle may no longer receive cybersecurity updates.</text:p>
      <text:p text:style-name="Text_20_body">Where feasible, the manufacturer may provide recommendations to reduce potential risks associated with continued operation of unsupported products.</text:p>
      <text:h text:style-name="Heading_20_1" text:outline-level="1">8. Good Faith Research</text:h>
      <text:p text:style-name="Text_20_body">The manufacturer welcomes reports submitted in good faith with the objective of improving product cybersecurity.</text:p>
      <text:p text:style-name="Text_20_body">Researchers are requested to:</text:p>
      <text:list xml:id="list6815296954827824682" text:style-name="L6">
        <text:list-item>
          <text:p text:style-name="P6">Avoid actions that could endanger people or equipment.</text:p>
        </text:list-item>
        <text:list-item>
          <text:p text:style-name="P6">Avoid unnecessary interruption of customer operations.</text:p>
        </text:list-item>
        <text:list-item>
          <text:p text:style-name="P6">Respect applicable laws and contractual obligations.</text:p>
        </text:list-item>
        <text:list-item>
          <text:p text:style-name="P6">Report findings responsibly.</text:p>
        </text:list-item>
      </text:list>
      <text:h text:style-name="Heading_20_1" text:outline-level="1">9. Contact Information</text:h>
      <text:p text:style-name="Text_20_body">Security Contact</text:p>
      <text:p text:style-name="Text_20_body"><text:span text:style-name="Strong_20_Emphasis">[Company Name]</text:span></text:p>
      <text:p text:style-name="Text_20_body">Email:</text:p>
      <text:p text:style-name="Text_20_body">security@[company].com</text:p>
      <text:p text:style-name="Text_20_body">Website:</text:p>
      <text:p text:style-name="Text_20_body"><text:a xlink:type="simple" xlink:href="https://www.example.com/security" text:style-name="Internet_20_link" text:visited-style-name="Visited_20_Internet_20_Link">https://www.example.com/security</text:a></text:p>
      <text:h text:style-name="Heading_20_1" text:outline-level="1"><text:soft-page-break/>10. Document History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Version</text:p>
            </table:table-cell>
            <table:table-cell table:style-name="Table1.A1" office:value-type="string">
              <text:p text:style-name="Table_20_Heading">Date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1.0</text:p>
          </table:table-cell>
          <table:table-cell table:style-name="Table1.A1" office:value-type="string">
            <text:p text:style-name="Table_20_Contents">[Date]</text:p>
          </table:table-cell>
          <table:table-cell table:style-name="Table1.A1" office:value-type="string">
            <text:p text:style-name="Table_20_Contents">Initial Draf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oris Radonic</meta:initial-creator>
    <meta:creation-date>2026-07-06T11:06:04.17</meta:creation-date>
    <dc:date>2026-07-06T11:08:31.75</dc:date>
    <dc:creator>Boris Radonic</dc:creator>
    <meta:editing-duration>PT2M27S</meta:editing-duration>
    <meta:editing-cycles>2</meta:editing-cycles>
    <meta:generator>OpenOffice/4.1.16$Win32 OpenOffice.org_project/4116m3$Build-9816</meta:generator>
    <meta:document-statistic meta:table-count="1" meta:image-count="0" meta:object-count="0" meta:page-count="4" meta:paragraph-count="82" meta:word-count="488" meta:character-count="3555"/>
  </office:meta>
</office:document-meta>
</file>